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Iskoola Pota" svg:font-family="Iskoola Pota" style:font-family-generic="swiss" style:font-pitch="variable" svg:panose-1="2 11 5 2 4 2 4 2 2 3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Sinhala Notes | Learn Smarter, Achieve Higher&lt;/title&gt;</text:p>
      <text:p text:style-name="Normal"><text:s text:c="4"/>&lt;link rel="stylesheet" href="https://cdnjs.cloudflare.com/ajax/libs/font-awesome/6.4.0/css/all.min.css"&gt;</text:p>
      <text:p text:style-name="Normal"><text:s text:c="4"/>&lt;link rel="preconnect" href="https://fonts.googleapis.com"&gt;</text:p>
      <text:p text:style-name="Normal"><text:s text:c="4"/>&lt;link rel="preconnect" href="https://fonts.gstatic.com" crossorigin&gt;</text:p>
      <text:p text:style-name="Normal"><text:s text:c="4"/>&lt;link href="https://fonts.googleapis.com/css2?family=Inter:wght@300;400;500;600;700&amp;display=swap" rel="stylesheet"&gt;</text:p>
      <text:p text:style-name="Normal"/>
      <text:p text:style-name="Normal"><text:s text:c="4"/>&lt;style&gt;</text:p>
      <text:p text:style-name="Normal"><text:s text:c="8"/>/* --- CSS VARIABLES &amp; THEMING --- */</text:p>
      <text:p text:style-name="Normal"><text:s text:c="8"/>:root {</text:p>
      <text:p text:style-name="Normal"><text:s text:c="12"/>--primary: #0284c7;</text:p>
      <text:p text:style-name="Normal"><text:s text:c="12"/>--primary-hover: #0369a1;</text:p>
      <text:p text:style-name="Normal"><text:s text:c="12"/>--secondary: #0ea5e9;</text:p>
      <text:p text:style-name="Normal"><text:s text:c="12"/>--background: #f8fafc;</text:p>
      <text:p text:style-name="Normal"><text:s text:c="12"/>--surface: #ffffff;</text:p>
      <text:p text:style-name="Normal"><text:s text:c="12"/>--text-main: #0f172a;</text:p>
      <text:p text:style-name="Normal"><text:s text:c="12"/>--text-muted: #475569;</text:p>
      <text:p text:style-name="Normal"><text:s text:c="12"/>--border: #e2e8f0;</text:p>
      <text:p text:style-name="Normal"><text:s text:c="12"/>--shadow: 0 4px 6px -1px rgb(0 0 0 / 0.1), 0 2px 4px -2px rgb(0 0 0 / 0.1);</text:p>
      <text:p text:style-name="Normal"><text:s text:c="12"/>--transition: all 0.3s ease;</text:p>
      <text:p text:style-name="Normal"><text:s text:c="12"/>--radius: 12px;</text:p>
      <text:p text:style-name="Normal"><text:s text:c="8"/>}</text:p>
      <text:p text:style-name="Normal"/>
      <text:p text:style-name="Normal"><text:s text:c="8"/>[data-theme="dark"] {</text:p>
      <text:p text:style-name="Normal"><text:s text:c="12"/>--background: #0f172a;</text:p>
      <text:p text:style-name="Normal"><text:s text:c="12"/>--surface: #1e293b;</text:p>
      <text:p text:style-name="Normal"><text:s text:c="12"/>--text-main: #f8fafc;</text:p>
      <text:p text:style-name="Normal"><text:s text:c="12"/>--text-muted: #94a3b8;</text:p>
      <text:p text:style-name="Normal"><text:s text:c="12"/>--border: #334155;</text:p>
      <text:p text:style-name="Normal"><text:s text:c="12"/>--shadow: 0 4px 6px -1px rgb(0 0 0 / 0.5);</text:p>
      <text:p text:style-name="Normal"><text:s text:c="8"/>}</text:p>
      <text:p text:style-name="Normal"/>
      <text:p text:style-name="Normal"><text:s text:c="8"/>/* --- GLOBAL RESETS --- */</text:p>
      <text:p text:style-name="Normal"><text:s text:c="8"/>* {</text:p>
      <text:p text:style-name="Normal"><text:s text:c="12"/>margin: 0;</text:p>
      <text:p text:style-name="Normal"><text:s text:c="12"/>padding: 0;</text:p>
      <text:p text:style-name="Normal"><text:s text:c="12"/>box-sizing: border-box;</text:p>
      <text:p text:style-name="Normal"><text:s text:c="12"/>font-family: 'Inter', sans-serif;</text:p>
      <text:p text:style-name="Normal"><text:s text:c="8"/>}</text:p>
      <text:p text:style-name="Normal"/>
      <text:p text:style-name="Normal"><text:s text:c="8"/>html {</text:p>
      <text:p text:style-name="Normal"><text:s text:c="12"/>scroll-behavior: smooth;</text:p>
      <text:p text:style-name="Normal"><text:s text:c="8"/>}</text:p>
      <text:p text:style-name="Normal"/>
      <text:p text:style-name="Normal"><text:s text:c="8"/>body {</text:p>
      <text:p text:style-name="Normal"><text:s text:c="12"/>background-color: var(--background);</text:p>
      <text:p text:style-name="Normal"><text:s text:c="12"/>color: var(--text-main);</text:p>
      <text:p text:style-name="Normal"><text:s text:c="12"/>transition: var(--transition);</text:p>
      <text:p text:style-name="Normal"><text:s text:c="12"/>line-height: 1.6;</text:p>
      <text:p text:style-name="Normal"><text:s text:c="12"/>overflow-x: hidden;</text:p>
      <text:p text:style-name="Normal"><text:s text:c="8"/>}</text:p>
      <text:p text:style-name="Normal"/>
      <text:p text:style-name="Normal"><text:s text:c="8"/>a {</text:p>
      <text:p text:style-name="Normal"><text:s text:c="12"/>text-decoration: none;</text:p>
      <text:p text:style-name="Normal"><text:s text:c="12"/>color: inherit;</text:p>
      <text:p text:style-name="Normal"><text:s text:c="8"/>}</text:p>
      <text:p text:style-name="Normal"/>
      <text:p text:style-name="Normal"><text:s text:c="8"/>button, input, textarea, select {</text:p>
      <text:p text:style-name="Normal"><text:s text:c="12"/>outline: none;</text:p>
      <text:p text:style-name="Normal"><text:s text:c="12"/>border: none;</text:p>
      <text:p text:style-name="Normal"><text:s text:c="12"/>font-family: inherit;</text:p>
      <text:p text:style-name="Normal"><text:s text:c="8"/>}</text:p>
      <text:p text:style-name="Normal"/>
      <text:p text:style-name="Normal"><text:s text:c="8"/>.container {</text:p>
      <text:p text:style-name="Normal"><text:s text:c="12"/>max-width: 1200px;</text:p>
      <text:p text:style-name="Normal"><text:s text:c="12"/>margin: 0 auto;</text:p>
      <text:p text:style-name="Normal"><text:s text:c="12"/>padding: 0 20px;</text:p>
      <text:p text:style-name="Normal"><text:s text:c="8"/>}</text:p>
      <text:p text:style-name="Normal"/>
      <text:p text:style-name="Normal"><text:s text:c="8"/>/* --- PRELOADER --- */</text:p>
      <text:p text:style-name="Normal"><text:s text:c="8"/>#preloader {</text:p>
      <text:p text:style-name="Normal"><text:s text:c="12"/>position: fixed;</text:p>
      <text:p text:style-name="Normal"><text:s text:c="12"/>top: 0; left: 0; width: 100%; height: 100%;</text:p>
      <text:p text:style-name="Normal"><text:s text:c="12"/>background: var(--background);</text:p>
      <text:p text:style-name="Normal"><text:s text:c="12"/>z-index: 9999;</text:p>
      <text:p text:style-name="Normal"><text:s text:c="12"/>display: flex;</text:p>
      <text:p text:style-name="Normal"><text:s text:c="12"/>justify-content: center;</text:p>
      <text:p text:style-name="Normal"><text:s text:c="12"/>align-items: center;</text:p>
      <text:p text:style-name="Normal"><text:s text:c="12"/>transition: opacity 0.5s ease, visibility 0.5s ease;</text:p>
      <text:p text:style-name="Normal"><text:s text:c="8"/>}</text:p>
      <text:p text:style-name="Normal"><text:s text:c="8"/>.spinner {</text:p>
      <text:p text:style-name="Normal"><text:s text:c="12"/>width: 50px;</text:p>
      <text:p text:style-name="Normal"><text:s text:c="12"/>height: 50px;</text:p>
      <text:p text:style-name="Normal"><text:s text:c="12"/>border: 5px solid var(--border);</text:p>
      <text:p text:style-name="Normal"><text:s text:c="12"/>border-top: 5px solid var(--primary);</text:p>
      <text:p text:style-name="Normal"><text:s text:c="12"/>border-radius: 50%;</text:p>
      <text:p text:style-name="Normal"><text:s text:c="12"/>animation: spin 1s linear infinite;</text:p>
      <text:p text:style-name="Normal"><text:s text:c="8"/>}</text:p>
      <text:p text:style-name="Normal"><text:s text:c="8"/>@keyframes spin { 0% { transform: rotate(0deg); } 100% { transform: rotate(360deg); } }</text:p>
      <text:p text:style-name="Normal"/>
      <text:p text:style-name="Normal"><text:s text:c="8"/>/* --- NAVIGATION --- */</text:p>
      <text:p text:style-name="Normal"><text:s text:c="8"/>header {</text:p>
      <text:p text:style-name="Normal"><text:s text:c="12"/>background-color: var(--surface);</text:p>
      <text:p text:style-name="Normal"><text:s text:c="12"/>border-bottom: 1px solid var(--border);</text:p>
      <text:p text:style-name="Normal"><text:s text:c="12"/>position: sticky;</text:p>
      <text:p text:style-name="Normal"><text:s text:c="12"/>top: 0;</text:p>
      <text:p text:style-name="Normal"><text:s text:c="12"/>z-index: 100;</text:p>
      <text:p text:style-name="Normal"><text:s text:c="12"/>transition: var(--transition);</text:p>
      <text:p text:style-name="Normal"><text:s text:c="8"/>}</text:p>
      <text:p text:style-name="Normal"/>
      <text:p text:style-name="Normal"><text:s text:c="8"/>.navbar {</text:p>
      <text:p text:style-name="Normal"><text:s text:c="12"/>display: flex;</text:p>
      <text:p text:style-name="Normal"><text:s text:c="12"/>justify-content: space-between;</text:p>
      <text:p text:style-name="Normal"><text:s text:c="12"/>align-items: center;</text:p>
      <text:p text:style-name="Normal"><text:s text:c="12"/>height: 70px;</text:p>
      <text:p text:style-name="Normal"><text:s text:c="8"/>}</text:p>
      <text:p text:style-name="Normal"/>
      <text:p text:style-name="Normal"><text:s text:c="8"/>.logo {</text:p>
      <text:p text:style-name="Normal"><text:s text:c="12"/>font-size: 24px;</text:p>
      <text:p text:style-name="Normal"><text:s text:c="12"/>font-weight: 700;</text:p>
      <text:p text:style-name="Normal"><text:s text:c="12"/>color: var(--primary);</text:p>
      <text:p text:style-name="Normal"><text:s text:c="12"/>display: flex;</text:p>
      <text:p text:style-name="Normal"><text:s text:c="12"/>align-items: center;</text:p>
      <text:p text:style-name="Normal"><text:s text:c="12"/>gap: 8px;</text:p>
      <text:p text:style-name="Normal"><text:s text:c="8"/>}</text:p>
      <text:p text:style-name="Normal"/>
      <text:p text:style-name="Normal"><text:s text:c="8"/>.nav-links {</text:p>
      <text:p text:style-name="Normal"><text:s text:c="12"/>display: flex;</text:p>
      <text:p text:style-name="Normal"><text:s text:c="12"/>gap: 24px;</text:p>
      <text:p text:style-name="Normal"><text:s text:c="12"/>align-items: center;</text:p>
      <text:p text:style-name="Normal"><text:s text:c="12"/>list-style: none;</text:p>
      <text:p text:style-name="Normal"><text:s text:c="8"/>}</text:p>
      <text:p text:style-name="Normal"/>
      <text:p text:style-name="Normal"><text:s text:c="8"/>.nav-links a {</text:p>
      <text:p text:style-name="Normal"><text:s text:c="12"/>font-weight: 500;</text:p>
      <text:p text:style-name="Normal"><text:s text:c="12"/>color: var(--text-muted);</text:p>
      <text:p text:style-name="Normal"><text:s text:c="12"/>transition: var(--transition);</text:p>
      <text:p text:style-name="Normal"><text:s text:c="12"/>cursor: pointer;</text:p>
      <text:p text:style-name="Normal"><text:s text:c="12"/>position: relative;</text:p>
      <text:p text:style-name="Normal"><text:s text:c="12"/>padding: 4px 0;</text:p>
      <text:p text:style-name="Normal"><text:s text:c="8"/>}</text:p>
      <text:p text:style-name="Normal"/>
      <text:p text:style-name="Normal"><text:s text:c="8"/>.nav-links a:hover, .nav-links a.active {</text:p>
      <text:p text:style-name="Normal"><text:s text:c="12"/>color: var(--primary);</text:p>
      <text:p text:style-name="Normal"><text:s text:c="8"/>}</text:p>
      <text:p text:style-name="Normal"/>
      <text:p text:style-name="Normal"><text:s text:c="8"/>.nav-links a.active::after {</text:p>
      <text:p text:style-name="Normal"><text:s text:c="12"/>content: '';</text:p>
      <text:p text:style-name="Normal"><text:s text:c="12"/>position: absolute;</text:p>
      <text:p text:style-name="Normal"><text:s text:c="12"/>bottom: 0; left: 0; width: 100%; height: 2px;</text:p>
      <text:p text:style-name="Normal"><text:s text:c="12"/>background: var(--primary);</text:p>
      <text:p text:style-name="Normal"><text:s text:c="8"/>}</text:p>
      <text:p text:style-name="Normal"/>
      <text:p text:style-name="Normal"><text:s text:c="8"/>.nav-actions {</text:p>
      <text:p text:style-name="Normal"><text:s text:c="12"/>display: flex;</text:p>
      <text:p text:style-name="Normal"><text:s text:c="12"/>align-items: center;</text:p>
      <text:p text:style-name="Normal"><text:s text:c="12"/>gap: 16px;</text:p>
      <text:p text:style-name="Normal"><text:s text:c="8"/>}</text:p>
      <text:p text:style-name="Normal"/>
      <text:p text:style-name="Normal"><text:s text:c="8"/>.theme-toggle, .menu-toggle {</text:p>
      <text:p text:style-name="Normal"><text:s text:c="12"/>background: transparent;</text:p>
      <text:p text:style-name="Normal"><text:s text:c="12"/>font-size: 20px;</text:p>
      <text:p text:style-name="Normal"><text:s text:c="12"/>color: var(--text-main);</text:p>
      <text:p text:style-name="Normal"><text:s text:c="12"/>cursor: pointer;</text:p>
      <text:p text:style-name="Normal"><text:s text:c="12"/>padding: 8px;</text:p>
      <text:p text:style-name="Normal"><text:s text:c="12"/>border-radius: 50%;</text:p>
      <text:p text:style-name="Normal"><text:s text:c="12"/>transition: var(--transition);</text:p>
      <text:p text:style-name="Normal"><text:s text:c="8"/>}</text:p>
      <text:p text:style-name="Normal"/>
      <text:p text:style-name="Normal"><text:s text:c="8"/>.theme-toggle:hover {</text:p>
      <text:p text:style-name="Normal"><text:s text:c="12"/>background: var(--border);</text:p>
      <text:p text:style-name="Normal"><text:s text:c="8"/>}</text:p>
      <text:p text:style-name="Normal"/>
      <text:p text:style-name="Normal"><text:s text:c="8"/>.menu-toggle {</text:p>
      <text:p text:style-name="Normal"><text:s text:c="12"/>display: none;</text:p>
      <text:p text:style-name="Normal"><text:s text:c="8"/>}</text:p>
      <text:p text:style-name="Normal"/>
      <text:p text:style-name="Normal"><text:s text:c="8"/>/* --- APP SECTIONS MANAGEMENT --- */</text:p>
      <text:p text:style-name="Normal"><text:s text:c="8"/>.app-section {</text:p>
      <text:p text:style-name="Normal"><text:s text:c="12"/>display: none;</text:p>
      <text:p text:style-name="Normal"><text:s text:c="12"/>padding: 60px 0;</text:p>
      <text:p text:style-name="Normal"><text:s text:c="12"/>animation: fadeIn 0.5s ease forwards;</text:p>
      <text:p text:style-name="Normal"><text:s text:c="8"/>}</text:p>
      <text:p text:style-name="Normal"/>
      <text:p text:style-name="Normal"><text:s text:c="8"/>.app-section.active-section {</text:p>
      <text:p text:style-name="Normal"><text:s text:c="12"/>display: block;</text:p>
      <text:p text:style-name="Normal"><text:s text:c="8"/>}</text:p>
      <text:p text:style-name="Normal"/>
      <text:p text:style-name="Normal"><text:s text:c="8"/>@keyframes fadeIn {</text:p>
      <text:p text:style-name="Normal"><text:s text:c="12"/>from { opacity: 0; transform: translateY(15px); }</text:p>
      <text:p text:style-name="Normal"><text:s text:c="12"/>to { opacity: 1; transform: translateY(0); }</text:p>
      <text:p text:style-name="Normal"><text:s text:c="8"/>}</text:p>
      <text:p text:style-name="Normal"/>
      <text:p text:style-name="Normal"><text:s text:c="8"/>/* --- BUTTONS --- */</text:p>
      <text:p text:style-name="Normal"><text:s text:c="8"/>.btn {</text:p>
      <text:p text:style-name="Normal"><text:s text:c="12"/>padding: 12px 24px;</text:p>
      <text:p text:style-name="Normal"><text:s text:c="12"/>border-radius: var(--radius);</text:p>
      <text:p text:style-name="Normal"><text:s text:c="12"/>font-weight: 600;</text:p>
      <text:p text:style-name="Normal"><text:s text:c="12"/>cursor: pointer;</text:p>
      <text:p text:style-name="Normal"><text:s text:c="12"/>transition: var(--transition);</text:p>
      <text:p text:style-name="Normal"><text:s text:c="12"/>display: inline-flex;</text:p>
      <text:p text:style-name="Normal"><text:s text:c="12"/>align-items: center;</text:p>
      <text:p text:style-name="Normal"><text:s text:c="12"/>gap: 8px;</text:p>
      <text:p text:style-name="Normal"><text:s text:c="8"/>}</text:p>
      <text:p text:style-name="Normal"/>
      <text:p text:style-name="Normal"><text:s text:c="8"/>.btn-primary { background: var(--primary); color: #fff; }</text:p>
      <text:p text:style-name="Normal"><text:s text:c="8"/>.btn-primary:hover { background: var(--primary-hover); }</text:p>
      <text:p text:style-name="Normal"><text:s text:c="8"/>.btn-secondary { background: var(--border); color: var(--text-main); }</text:p>
      <text:p text:style-name="Normal"><text:s text:c="8"/>.btn-secondary:hover { opacity: 0.9; }</text:p>
      <text:p text:style-name="Normal"/>
      <text:p text:style-name="Normal"><text:s text:c="8"/>/* --- HERO SECTION --- */</text:p>
      <text:p text:style-name="Normal"><text:s text:c="8"/>.hero {</text:p>
      <text:p text:style-name="Normal"><text:s text:c="12"/>display: grid;</text:p>
      <text:p text:style-name="Normal"><text:s text:c="12"/>grid-template-columns: 1fr 1fr;</text:p>
      <text:p text:style-name="Normal"><text:s text:c="12"/>align-items: center;</text:p>
      <text:p text:style-name="Normal"><text:s text:c="12"/>gap: 40px;</text:p>
      <text:p text:style-name="Normal"><text:s text:c="12"/>padding: 60px 0;</text:p>
      <text:p text:style-name="Normal"><text:s text:c="8"/>}</text:p>
      <text:p text:style-name="Normal"/>
      <text:p text:style-name="Normal"><text:s text:c="8"/>.hero-text h1 {</text:p>
      <text:p text:style-name="Normal"><text:s text:c="12"/>font-size: 48px;</text:p>
      <text:p text:style-name="Normal"><text:s text:c="12"/>line-height: 1.2;</text:p>
      <text:p text:style-name="Normal"><text:s text:c="12"/>margin-bottom: 16px;</text:p>
      <text:p text:style-name="Normal"><text:s text:c="8"/>}</text:p>
      <text:p text:style-name="Normal"/>
      <text:p text:style-name="Normal"><text:s text:c="8"/>.hero-text h1 span { color: var(--primary); }</text:p>
      <text:p text:style-name="Normal"/>
      <text:p text:style-name="Normal"><text:s text:c="8"/>.hero-text p {</text:p>
      <text:p text:style-name="Normal"><text:s text:c="12"/>font-size: 18px;</text:p>
      <text:p text:style-name="Normal"><text:s text:c="12"/>color: var(--text-muted);</text:p>
      <text:p text:style-name="Normal"><text:s text:c="12"/>margin-bottom: 28px;</text:p>
      <text:p text:style-name="Normal"><text:s text:c="8"/>}</text:p>
      <text:p text:style-name="Normal"/>
      <text:p text:style-name="Normal"><text:s text:c="8"/>.hero-buttons { display: flex; gap: 16px; }</text:p>
      <text:p text:style-name="Normal"/>
      <text:p text:style-name="Normal"><text:s text:c="8"/>.hero-image img {</text:p>
      <text:p text:style-name="Normal"><text:s text:c="12"/>width: 100%;</text:p>
      <text:p text:style-name="Normal"><text:s text:c="12"/>max-width: 500px;</text:p>
      <text:p text:style-name="Normal"><text:s text:c="12"/>display: block;</text:p>
      <text:p text:style-name="Normal"><text:s text:c="12"/>margin: 0 auto;</text:p>
      <text:p text:style-name="Normal"><text:s text:c="12"/>animation: float 4s ease-in-out infinite;</text:p>
      <text:p text:style-name="Normal"><text:s text:c="8"/>}</text:p>
      <text:p text:style-name="Normal"/>
      <text:p text:style-name="Normal"><text:s text:c="8"/>@keyframes float {</text:p>
      <text:p text:style-name="Normal"><text:s text:c="12"/>0%, 100% { transform: translateY(0); }</text:p>
      <text:p text:style-name="Normal"><text:s text:c="12"/>50% { transform: translateY(-15px); }</text:p>
      <text:p text:style-name="Normal"><text:s text:c="8"/>}</text:p>
      <text:p text:style-name="Normal"/>
      <text:p text:style-name="Normal"><text:s text:c="8"/>/* --- STATS SECTION --- */</text:p>
      <text:p text:style-name="Normal"><text:s text:c="8"/>.stats-grid {</text:p>
      <text:p text:style-name="Normal"><text:s text:c="12"/>display: grid;</text:p>
      <text:p text:style-name="Normal"><text:s text:c="12"/>grid-template-columns: repeat(3, 1fr);</text:p>
      <text:p text:style-name="Normal"><text:s text:c="12"/>gap: 24px;</text:p>
      <text:p text:style-name="Normal"><text:s text:c="12"/>margin: 40px 0;</text:p>
      <text:p text:style-name="Normal"><text:s text:c="12"/>text-align: center;</text:p>
      <text:p text:style-name="Normal"><text:s text:c="8"/>}</text:p>
      <text:p text:style-name="Normal"/>
      <text:p text:style-name="Normal"><text:s text:c="8"/>.stat-card {</text:p>
      <text:p text:style-name="Normal"><text:s text:c="12"/>background: var(--surface);</text:p>
      <text:p text:style-name="Normal"><text:s text:c="12"/>padding: 30px;</text:p>
      <text:p text:style-name="Normal"><text:s text:c="12"/>border-radius: var(--radius);</text:p>
      <text:p text:style-name="Normal"><text:s text:c="12"/>box-shadow: var(--shadow);</text:p>
      <text:p text:style-name="Normal"><text:s text:c="12"/>border: 1px solid var(--border);</text:p>
      <text:p text:style-name="Normal"><text:s text:c="8"/>}</text:p>
      <text:p text:style-name="Normal"/>
      <text:p text:style-name="Normal"><text:s text:c="8"/>.stat-card i {</text:p>
      <text:p text:style-name="Normal"><text:s text:c="12"/>font-size: 32px;</text:p>
      <text:p text:style-name="Normal"><text:s text:c="12"/>color: var(--primary);</text:p>
      <text:p text:style-name="Normal"><text:s text:c="12"/>margin-bottom: 12px;</text:p>
      <text:p text:style-name="Normal"><text:s text:c="8"/>}</text:p>
      <text:p text:style-name="Normal"/>
      <text:p text:style-name="Normal"><text:s text:c="8"/>.stat-card h3 { font-size: 36px; margin-bottom: 4px; }</text:p>
      <text:p text:style-name="Normal"/>
      <text:p text:style-name="Normal"><text:s text:c="8"/>/* --- FEATURED / CARDS GENERIC --- */</text:p>
      <text:p text:style-name="Normal"><text:s text:c="8"/>.section-header {</text:p>
      <text:p text:style-name="Normal"><text:s text:c="12"/>text-align: center;</text:p>
      <text:p text:style-name="Normal"><text:s text:c="12"/>margin-bottom: 40px;</text:p>
      <text:p text:style-name="Normal"><text:s text:c="8"/>}</text:p>
      <text:p text:style-name="Normal"/>
      <text:p text:style-name="Normal"><text:s text:c="8"/>.section-header h2 { font-size: 32px; margin-bottom: 8px; }</text:p>
      <text:p text:style-name="Normal"/>
      <text:p text:style-name="Normal"><text:s text:c="8"/>.grid-3 {</text:p>
      <text:p text:style-name="Normal"><text:s text:c="12"/>display: grid;</text:p>
      <text:p text:style-name="Normal"><text:s text:c="12"/>grid-template-columns: repeat(auto-fill, minmax(300px, 1fr));</text:p>
      <text:p text:style-name="Normal"><text:s text:c="12"/>gap: 24px;</text:p>
      <text:p text:style-name="Normal"><text:s text:c="8"/>}</text:p>
      <text:p text:style-name="Normal"/>
      <text:p text:style-name="Normal"><text:s text:c="8"/>.card {</text:p>
      <text:p text:style-name="Normal"><text:s text:c="12"/>background: var(--surface);</text:p>
      <text:p text:style-name="Normal"><text:s text:c="12"/>border-radius: var(--radius);</text:p>
      <text:p text:style-name="Normal"><text:s text:c="12"/>padding: 24px;</text:p>
      <text:p text:style-name="Normal"><text:s text:c="12"/>border: 1px solid var(--border);</text:p>
      <text:p text:style-name="Normal"><text:s text:c="12"/>box-shadow: var(--shadow);</text:p>
      <text:p text:style-name="Normal"><text:s text:c="12"/>transition: var(--transition);</text:p>
      <text:p text:style-name="Normal"><text:s text:c="8"/>}</text:p>
      <text:p text:style-name="Normal"/>
      <text:p text:style-name="Normal"><text:s text:c="8"/>.card:hover {</text:p>
      <text:p text:style-name="Normal"><text:s text:c="12"/>transform: translateY(-5px);</text:p>
      <text:p text:style-name="Normal"><text:s text:c="8"/>}</text:p>
      <text:p text:style-name="Normal"/>
      <text:p text:style-name="Normal"><text:s text:c="8"/>.subject-card {</text:p>
      <text:p text:style-name="Normal"><text:s text:c="12"/>text-align: center;</text:p>
      <text:p text:style-name="Normal"><text:s text:c="12"/>cursor: pointer;</text:p>
      <text:p text:style-name="Normal"><text:s text:c="8"/>}</text:p>
      <text:p text:style-name="Normal"/>
      <text:p text:style-name="Normal"><text:s text:c="8"/>.subject-card i {</text:p>
      <text:p text:style-name="Normal"><text:s text:c="12"/>font-size: 40px;</text:p>
      <text:p text:style-name="Normal"><text:s text:c="12"/>color: var(--primary);</text:p>
      <text:p text:style-name="Normal"><text:s text:c="12"/>margin-bottom: 16px;</text:p>
      <text:p text:style-name="Normal"><text:s text:c="8"/>}</text:p>
      <text:p text:style-name="Normal"/>
      <text:p text:style-name="Normal"><text:s text:c="8"/>/* --- FILTERS &amp; SEARCH BAR --- */</text:p>
      <text:p text:style-name="Normal"><text:s text:c="8"/>.search-filter-wrapper {</text:p>
      <text:p text:style-name="Normal"><text:s text:c="12"/>background: var(--surface);</text:p>
      <text:p text:style-name="Normal"><text:s text:c="12"/>padding: 20px;</text:p>
      <text:p text:style-name="Normal"><text:s text:c="12"/>border-radius: var(--radius);</text:p>
      <text:p text:style-name="Normal"><text:s text:c="12"/>border: 1px solid var(--border);</text:p>
      <text:p text:style-name="Normal"><text:s text:c="12"/>margin-bottom: 30px;</text:p>
      <text:p text:style-name="Normal"><text:s text:c="12"/>display: flex;</text:p>
      <text:p text:style-name="Normal"><text:s text:c="12"/>flex-direction: column;</text:p>
      <text:p text:style-name="Normal"><text:s text:c="12"/>gap: 16px;</text:p>
      <text:p text:style-name="Normal"><text:s text:c="8"/>}</text:p>
      <text:p text:style-name="Normal"/>
      <text:p text:style-name="Normal"><text:s text:c="8"/>.search-box {</text:p>
      <text:p text:style-name="Normal"><text:s text:c="12"/>position: relative;</text:p>
      <text:p text:style-name="Normal"><text:s text:c="12"/>width: 100%;</text:p>
      <text:p text:style-name="Normal"><text:s text:c="8"/>}</text:p>
      <text:p text:style-name="Normal"/>
      <text:p text:style-name="Normal"><text:s text:c="8"/>.search-box input {</text:p>
      <text:p text:style-name="Normal"><text:s text:c="12"/>width: 100%;</text:p>
      <text:p text:style-name="Normal"><text:s text:c="12"/>padding: 14px 16px 14px 45px;</text:p>
      <text:p text:style-name="Normal"><text:s text:c="12"/>background: var(--background);</text:p>
      <text:p text:style-name="Normal"><text:s text:c="12"/>border: 1px solid var(--border);</text:p>
      <text:p text:style-name="Normal"><text:s text:c="12"/>color: var(--text-main);</text:p>
      <text:p text:style-name="Normal"><text:s text:c="12"/>border-radius: 8px;</text:p>
      <text:p text:style-name="Normal"><text:s text:c="12"/>font-size: 16px;</text:p>
      <text:p text:style-name="Normal"><text:s text:c="8"/>}</text:p>
      <text:p text:style-name="Normal"/>
      <text:p text:style-name="Normal"><text:s text:c="8"/>.search-box i {</text:p>
      <text:p text:style-name="Normal"><text:s text:c="12"/>position: absolute;</text:p>
      <text:p text:style-name="Normal"><text:s text:c="12"/>left: 16px; top: 50%;</text:p>
      <text:p text:style-name="Normal"><text:s text:c="12"/>transform: translateY(-50%);</text:p>
      <text:p text:style-name="Normal"><text:s text:c="12"/>color: var(--text-muted);</text:p>
      <text:p text:style-name="Normal"><text:s text:c="8"/>}</text:p>
      <text:p text:style-name="Normal"/>
      <text:p text:style-name="Normal"><text:s text:c="8"/>.filter-group {</text:p>
      <text:p text:style-name="Normal"><text:s text:c="12"/>display: flex;</text:p>
      <text:p text:style-name="Normal"><text:s text:c="12"/>flex-wrap: wrap;</text:p>
      <text:p text:style-name="Normal"><text:s text:c="12"/>gap: 10px;</text:p>
      <text:p text:style-name="Normal"><text:s text:c="12"/>align-items: center;</text:p>
      <text:p text:style-name="Normal"><text:s text:c="8"/>}</text:p>
      <text:p text:style-name="Normal"/>
      <text:p text:style-name="Normal"><text:s text:c="8"/>.filter-label {</text:p>
      <text:p text:style-name="Normal"><text:s text:c="12"/>font-weight: 600;</text:p>
      <text:p text:style-name="Normal"><text:s text:c="12"/>color: var(--text-muted);</text:p>
      <text:p text:style-name="Normal"><text:s text:c="12"/>margin-right: 8px;</text:p>
      <text:p text:style-name="Normal"><text:s text:c="8"/>}</text:p>
      <text:p text:style-name="Normal"/>
      <text:p text:style-name="Normal"><text:s text:c="8"/>.filter-btn {</text:p>
      <text:p text:style-name="Normal"><text:s text:c="12"/>padding: 6px 16px;</text:p>
      <text:p text:style-name="Normal"><text:s text:c="12"/>background: var(--background);</text:p>
      <text:p text:style-name="Normal"><text:s text:c="12"/>border: 1px solid var(--border);</text:p>
      <text:p text:style-name="Normal"><text:s text:c="12"/>color: var(--text-muted);</text:p>
      <text:p text:style-name="Normal"><text:s text:c="12"/>border-radius: 20px;</text:p>
      <text:p text:style-name="Normal"><text:s text:c="12"/>cursor: pointer;</text:p>
      <text:p text:style-name="Normal"><text:s text:c="12"/>font-weight: 500;</text:p>
      <text:p text:style-name="Normal"><text:s text:c="12"/>transition: var(--transition);</text:p>
      <text:p text:style-name="Normal"><text:s text:c="8"/>}</text:p>
      <text:p text:style-name="Normal"/>
      <text:p text:style-name="Normal"><text:s text:c="8"/>.filter-btn.active, .filter-btn:hover {</text:p>
      <text:p text:style-name="Normal"><text:s text:c="12"/>background: var(--primary);</text:p>
      <text:p text:style-name="Normal"><text:s text:c="12"/>color: white;</text:p>
      <text:p text:style-name="Normal"><text:s text:c="12"/>border-color: var(--primary);</text:p>
      <text:p text:style-name="Normal"><text:s text:c="8"/>}</text:p>
      <text:p text:style-name="Normal"/>
      <text:p text:style-name="Normal"><text:s text:c="8"/>/* --- RESOURCE/RESOURCE CARDS --- */</text:p>
      <text:p text:style-name="Normal"><text:s text:c="8"/>.res-card-meta {</text:p>
      <text:p text:style-name="Normal"><text:s text:c="12"/>display: flex;</text:p>
      <text:p text:style-name="Normal"><text:s text:c="12"/>justify-content: space-between;</text:p>
      <text:p text:style-name="Normal"><text:s text:c="12"/>margin-bottom: 12px;</text:p>
      <text:p text:style-name="Normal"><text:s text:c="12"/>font-size: 13px;</text:p>
      <text:p text:style-name="Normal"><text:s text:c="12"/>font-weight: 600;</text:p>
      <text:p text:style-name="Normal"><text:s text:c="8"/>}</text:p>
      <text:p text:style-name="Normal"/>
      <text:p text:style-name="Normal"><text:s text:c="8"/>.badge-grade { background: rgba(2, 132, 199, 0.1); color: var(--primary); padding: 2px 8px; border-radius: 4px; }</text:p>
      <text:p text:style-name="Normal"><text:s text:c="8"/>.badge-subject { background: rgba(14, 165, 233, 0.1); color: var(--secondary); padding: 2px 8px; border-radius: 4px; }</text:p>
      <text:p text:style-name="Normal"/>
      <text:p text:style-name="Normal"><text:s text:c="8"/>.res-card h3 { font-size: 18px; margin-bottom: 8px; }</text:p>
      <text:p text:style-name="Normal"><text:s text:c="8"/>.res-card p { font-size: 14px; color: var(--text-muted); margin-bottom: 20px; }</text:p>
      <text:p text:style-name="Normal"><text:s text:c="8"/></text:p>
      <text:p text:style-name="Normal"><text:s text:c="8"/>.res-card-footer {</text:p>
      <text:p text:style-name="Normal"><text:s text:c="12"/>display: flex;</text:p>
      <text:p text:style-name="Normal"><text:s text:c="12"/>justify-content: space-between;</text:p>
      <text:p text:style-name="Normal"><text:s text:c="12"/>align-items: center;</text:p>
      <text:p text:style-name="Normal"><text:s text:c="12"/>border-top: 1px solid var(--border);</text:p>
      <text:p text:style-name="Normal"><text:s text:c="12"/>padding-top: 14px;</text:p>
      <text:p text:style-name="Normal"><text:s text:c="8"/>}</text:p>
      <text:p text:style-name="Normal"/>
      <text:p text:style-name="Normal"><text:s text:c="8"/>.download-count { font-size: 13px; color: var(--text-muted); }</text:p>
      <text:p text:style-name="Normal"/>
      <text:p text:style-name="Normal"><text:s text:c="8"/>/* --- TIPS SLIDER --- */</text:p>
      <text:p text:style-name="Normal"><text:s text:c="8"/>.slider-container {</text:p>
      <text:p text:style-name="Normal"><text:s text:c="12"/>background: var(--surface);</text:p>
      <text:p text:style-name="Normal"><text:s text:c="12"/>border-radius: var(--radius);</text:p>
      <text:p text:style-name="Normal"><text:s text:c="12"/>padding: 30px;</text:p>
      <text:p text:style-name="Normal"><text:s text:c="12"/>text-align: center;</text:p>
      <text:p text:style-name="Normal"><text:s text:c="12"/>position: relative;</text:p>
      <text:p text:style-name="Normal"><text:s text:c="12"/>box-shadow: var(--shadow);</text:p>
      <text:p text:style-name="Normal"><text:s text:c="12"/>border: 1px solid var(--border);</text:p>
      <text:p text:style-name="Normal"><text:s text:c="12"/>max-width: 800px;</text:p>
      <text:p text:style-name="Normal"><text:s text:c="12"/>margin: 0 auto;</text:p>
      <text:p text:style-name="Normal"><text:s text:c="8"/>}</text:p>
      <text:p text:style-name="Normal"/>
      <text:p text:style-name="Normal"><text:s text:c="8"/>.slide { display: none; }</text:p>
      <text:p text:style-name="Normal"><text:s text:c="8"/>.slide.active-slide { display: block; animation: fadeIn 0.5s; }</text:p>
      <text:p text:style-name="Normal"><text:s text:c="8"/>.slide i { font-size: 32px; color: var(--primary); margin-bottom: 16px; }</text:p>
      <text:p text:style-name="Normal"><text:s text:c="8"/>.slide p { font-style: italic; font-size: 18px; margin-bottom: 12px; }</text:p>
      <text:p text:style-name="Normal"><text:s text:c="8"/>.slide h5 { color: var(--primary); font-size: 14px; }</text:p>
      <text:p text:style-name="Normal"/>
      <text:p text:style-name="Normal"><text:s text:c="8"/>/* --- CONTACT PAGE --- */</text:p>
      <text:p text:style-name="Normal"><text:s text:c="8"/>.contact-wrapper {</text:p>
      <text:p text:style-name="Normal"><text:s text:c="12"/>display: grid;</text:p>
      <text:p text:style-name="Normal"><text:s text:c="12"/>grid-template-columns: 1fr 1fr;</text:p>
      <text:p text:style-name="Normal"><text:s text:c="12"/>gap: 40px;</text:p>
      <text:p text:style-name="Normal"><text:s text:c="8"/>}</text:p>
      <text:p text:style-name="Normal"/>
      <text:p text:style-name="Normal"><text:s text:c="8"/>.contact-form {</text:p>
      <text:p text:style-name="Normal"><text:s text:c="12"/>background: var(--surface);</text:p>
      <text:p text:style-name="Normal"><text:s text:c="12"/>padding: 30px;</text:p>
      <text:p text:style-name="Normal"><text:s text:c="12"/>border-radius: var(--radius);</text:p>
      <text:p text:style-name="Normal"><text:s text:c="12"/>border: 1px solid var(--border);</text:p>
      <text:p text:style-name="Normal"><text:s text:c="12"/>box-shadow: var(--shadow);</text:p>
      <text:p text:style-name="Normal"><text:s text:c="8"/>}</text:p>
      <text:p text:style-name="Normal"/>
      <text:p text:style-name="Normal"><text:s text:c="8"/>.form-group {</text:p>
      <text:p text:style-name="Normal"><text:s text:c="12"/>margin-bottom: 20px;</text:p>
      <text:p text:style-name="Normal"><text:s text:c="8"/>}</text:p>
      <text:p text:style-name="Normal"/>
      <text:p text:style-name="Normal"><text:s text:c="8"/>.form-group label {</text:p>
      <text:p text:style-name="Normal"><text:s text:c="12"/>display: block;</text:p>
      <text:p text:style-name="Normal"><text:s text:c="12"/>margin-bottom: 8px;</text:p>
      <text:p text:style-name="Normal"><text:s text:c="12"/>font-weight: 500;</text:p>
      <text:p text:style-name="Normal"><text:s text:c="8"/>}</text:p>
      <text:p text:style-name="Normal"/>
      <text:p text:style-name="Normal"><text:s text:c="8"/>.form-group input, .form-group textarea {</text:p>
      <text:p text:style-name="Normal"><text:s text:c="12"/>width: 100%;</text:p>
      <text:p text:style-name="Normal"><text:s text:c="12"/>padding: 12px;</text:p>
      <text:p text:style-name="Normal"><text:s text:c="12"/>background: var(--background);</text:p>
      <text:p text:style-name="Normal"><text:s text:c="12"/>border: 1px solid var(--border);</text:p>
      <text:p text:style-name="Normal"><text:s text:c="12"/>color: var(--text-main);</text:p>
      <text:p text:style-name="Normal"><text:s text:c="12"/>border-radius: 8px;</text:p>
      <text:p text:style-name="Normal"><text:s text:c="8"/>}</text:p>
      <text:p text:style-name="Normal"/>
      <text:p text:style-name="Normal"><text:s text:c="8"/>.map-placeholder {</text:p>
      <text:p text:style-name="Normal"><text:s text:c="12"/>background: var(--border);</text:p>
      <text:p text:style-name="Normal"><text:s text:c="12"/>border-radius: var(--radius);</text:p>
      <text:p text:style-name="Normal"><text:s text:c="12"/>display: flex;</text:p>
      <text:p text:style-name="Normal"><text:s text:c="12"/>justify-content: center;</text:p>
      <text:p text:style-name="Normal"><text:s text:c="12"/>align-items: center;</text:p>
      <text:p text:style-name="Normal"><text:s text:c="12"/>min-height: 300px;</text:p>
      <text:p text:style-name="Normal"><text:s text:c="12"/>text-align: center;</text:p>
      <text:p text:style-name="Normal"><text:s text:c="12"/>flex-direction: column;</text:p>
      <text:p text:style-name="Normal"><text:s text:c="12"/>gap: 12px;</text:p>
      <text:p text:style-name="Normal"><text:s text:c="12"/>color: var(--text-muted);</text:p>
      <text:p text:style-name="Normal"><text:s text:c="8"/>}</text:p>
      <text:p text:style-name="Normal"/>
      <text:p text:style-name="Normal"><text:s text:c="8"/>/* --- FAQ SECTION --- */</text:p>
      <text:p text:style-name="Normal"><text:s text:c="8"/>.faq-wrapper { max-width: 700px; margin: 0 auto; display: flex; flex-direction: column; gap: 16px; }</text:p>
      <text:p text:style-name="Normal"><text:s text:c="8"/>.faq-item { background: var(--surface); border: 1px solid var(--border); border-radius: var(--radius); overflow: hidden; }</text:p>
      <text:p text:style-name="Normal"><text:s text:c="8"/>.faq-header { padding: 18px; display: flex; justify-content: space-between; align-items: center; cursor: pointer; font-weight: 600; }</text:p>
      <text:p text:style-name="Normal"><text:s text:c="8"/>.faq-body { padding: 0 18px; max-height: 0; overflow: hidden; transition: max-height 0.3s ease, padding 0.3s ease; color: var(--text-muted); font-size: 15px;}</text:p>
      <text:p text:style-name="Normal"><text:s text:c="8"/>.faq-item.open .faq-body { padding: 0 18px 18px 18px; max-height: 200px; }</text:p>
      <text:p text:style-name="Normal"><text:s text:c="8"/>.faq-item.open i { transform: rotate(180deg); transition: transform 0.3s; }</text:p>
      <text:p text:style-name="Normal"/>
      <text:p text:style-name="Normal"><text:s text:c="8"/>/* --- FOOTER &amp; NEWSLETTER --- */</text:p>
      <text:p text:style-name="Normal"><text:s text:c="8"/>.newsletter-bar {</text:p>
      <text:p text:style-name="Normal"><text:s text:c="12"/>background: var(--primary);</text:p>
      <text:p text:style-name="Normal"><text:s text:c="12"/>color: white;</text:p>
      <text:p text:style-name="Normal"><text:s text:c="12"/>padding: 40px 0;</text:p>
      <text:p text:style-name="Normal"><text:s text:c="12"/>margin-top: 60px;</text:p>
      <text:p text:style-name="Normal"><text:s text:c="12"/>text-align: center;</text:p>
      <text:p text:style-name="Normal"><text:s text:c="8"/>}</text:p>
      <text:p text:style-name="Normal"><text:s text:c="8"/>.newsletter-form {</text:p>
      <text:p text:style-name="Normal"><text:s text:c="12"/>display: flex;</text:p>
      <text:p text:style-name="Normal"><text:s text:c="12"/>max-width: 500px;</text:p>
      <text:p text:style-name="Normal"><text:s text:c="12"/>margin: 20px auto 0 auto;</text:p>
      <text:p text:style-name="Normal"><text:s text:c="12"/>gap: 8px;</text:p>
      <text:p text:style-name="Normal"><text:s text:c="8"/>}</text:p>
      <text:p text:style-name="Normal"><text:s text:c="8"/>.newsletter-form input { flex: 1; padding: 12px; border-radius: var(--radius); }</text:p>
      <text:p text:style-name="Normal"/>
      <text:p text:style-name="Normal"><text:s text:c="8"/>footer {</text:p>
      <text:p text:style-name="Normal"><text:s text:c="12"/>background: #0f172a;</text:p>
      <text:p text:style-name="Normal"><text:s text:c="12"/>color: #94a3b8;</text:p>
      <text:p text:style-name="Normal"><text:s text:c="12"/>padding: 60px 0 20px 0;</text:p>
      <text:p text:style-name="Normal"><text:s text:c="12"/>border-top: 1px solid #334155;</text:p>
      <text:p text:style-name="Normal"><text:s text:c="8"/>}</text:p>
      <text:p text:style-name="Normal"/>
      <text:p text:style-name="Normal"><text:s text:c="8"/>.footer-grid {</text:p>
      <text:p text:style-name="Normal"><text:s text:c="12"/>display: grid;</text:p>
      <text:p text:style-name="Normal"><text:s text:c="12"/>grid-template-columns: 2fr 1fr 1fr;</text:p>
      <text:p text:style-name="Normal"><text:s text:c="12"/>gap: 40px;</text:p>
      <text:p text:style-name="Normal"><text:s text:c="12"/>margin-bottom: 40px;</text:p>
      <text:p text:style-name="Normal"><text:s text:c="8"/>}</text:p>
      <text:p text:style-name="Normal"/>
      <text:p text:style-name="Normal"><text:s text:c="8"/>.footer-brand h3 { color: white; font-size: 24px; margin-bottom: 12px; }</text:p>
      <text:p text:style-name="Normal"><text:s text:c="8"/>.footer-links h4 { color: white; margin-bottom: 16px; }</text:p>
      <text:p text:style-name="Normal"><text:s text:c="8"/>.footer-links ul { list-style: none; display: flex; flex-direction: column; gap: 10px; }</text:p>
      <text:p text:style-name="Normal"><text:s text:c="8"/>.footer-links a:hover { color: white; }</text:p>
      <text:p text:style-name="Normal"><text:s text:c="8"/></text:p>
      <text:p text:style-name="Normal"><text:s text:c="8"/>.social-icons { display: flex; gap: 16px; margin-top: 16px; }</text:p>
      <text:p text:style-name="Normal"><text:s text:c="8"/>.social-icons a { font-size: 20px; transition: var(--transition); }</text:p>
      <text:p text:style-name="Normal"><text:s text:c="8"/>.social-icons a:hover { color: var(--primary); }</text:p>
      <text:p text:style-name="Normal"/>
      <text:p text:style-name="Normal"><text:s text:c="8"/>.footer-bottom { text-align: center; padding-top: 20px; border-top: 1px solid #334155; font-size: 14px; }</text:p>
      <text:p text:style-name="Normal"/>
      <text:p text:style-name="Normal"><text:s text:c="8"/>/* --- SCROLL TO TOP --- */</text:p>
      <text:p text:style-name="Normal"><text:s text:c="8"/>.scroll-top {</text:p>
      <text:p text:style-name="Normal"><text:s text:c="12"/>position: fixed;</text:p>
      <text:p text:style-name="Normal"><text:s text:c="12"/>bottom: 30px; right: -60px;</text:p>
      <text:p text:style-name="Normal"><text:s text:c="12"/>background: var(--primary);</text:p>
      <text:p text:style-name="Normal"><text:s text:c="12"/>color: white;</text:p>
      <text:p text:style-name="Normal"><text:s text:c="12"/>width: 45px; height: 45px;</text:p>
      <text:p text:style-name="Normal"><text:s text:c="12"/>border-radius: 50%;</text:p>
      <text:p text:style-name="Normal"><text:s text:c="12"/>display: flex; justify-content: center; align-items: center;</text:p>
      <text:p text:style-name="Normal"><text:s text:c="12"/>cursor: pointer; box-shadow: var(--shadow);</text:p>
      <text:p text:style-name="Normal"><text:s text:c="12"/>transition: var(--transition);</text:p>
      <text:p text:style-name="Normal"><text:s text:c="12"/>z-index: 99;</text:p>
      <text:p text:style-name="Normal"><text:s text:c="8"/>}</text:p>
      <text:p text:style-name="Normal"><text:s text:c="8"/>.scroll-top.visible { right: 30px; }</text:p>
      <text:p text:style-name="Normal"/>
      <text:p text:style-name="Normal"><text:s text:c="8"/>/* --- RESPONSIVENESS --- */</text:p>
      <text:p text:style-name="Normal"><text:s text:c="8"/>@media (max-width: 768px) {</text:p>
      <text:p text:style-name="Normal"><text:s text:c="12"/>.menu-toggle { display: block; }</text:p>
      <text:p text:style-name="Normal"><text:s text:c="12"/>.nav-links {</text:p>
      <text:p text:style-name="Normal"><text:s text:c="16"/>position: fixed;</text:p>
      <text:p text:style-name="Normal"><text:s text:c="16"/>top: 70px; left: -100%;</text:p>
      <text:p text:style-name="Normal"><text:s text:c="16"/>width: 100%; height: calc(100vh - 70px);</text:p>
      <text:p text:style-name="Normal"><text:s text:c="16"/>background: var(--surface);</text:p>
      <text:p text:style-name="Normal"><text:s text:c="16"/>flex-direction: column;</text:p>
      <text:p text:style-name="Normal"><text:s text:c="16"/>padding: 40px;</text:p>
      <text:p text:style-name="Normal"><text:s text:c="16"/>transition: var(--transition);</text:p>
      <text:p text:style-name="Normal"><text:s text:c="16"/>align-items: flex-start;</text:p>
      <text:p text:style-name="Normal"><text:s text:c="16"/>border-top: 1px solid var(--border);</text:p>
      <text:p text:style-name="Normal"><text:s text:c="12"/>}</text:p>
      <text:p text:style-name="Normal"><text:s text:c="12"/>.nav-links.mobile-open { left: 0; }</text:p>
      <text:p text:style-name="Normal"><text:s text:c="12"/>.hero { grid-template-columns: 1fr; text-align: center; }</text:p>
      <text:p text:style-name="Normal"><text:s text:c="12"/>.hero-buttons { justify-content: center; }</text:p>
      <text:p text:style-name="Normal"><text:s text:c="12"/>.stats-grid { grid-template-columns: 1fr; }</text:p>
      <text:p text:style-name="Normal"><text:s text:c="12"/>.contact-wrapper { grid-template-columns: 1fr; }</text:p>
      <text:p text:style-name="Normal"><text:s text:c="12"/>.footer-grid { grid-template-columns: 1fr; }</text:p>
      <text:p text:style-name="Normal"><text:s text:c="8"/>}</text:p>
      <text:p text:style-name="Normal"><text:s text:c="4"/>&lt;/style&gt;</text:p>
      <text:p text:style-name="Normal">&lt;/head&gt;</text:p>
      <text:p text:style-name="Normal">&lt;body&gt;</text:p>
      <text:p text:style-name="Normal"/>
      <text:p text:style-name="Normal"><text:s text:c="4"/>&lt;div id="preloader"&gt;</text:p>
      <text:p text:style-name="Normal"><text:s text:c="8"/>&lt;div class="spinner"&gt;&lt;/div&gt;</text:p>
      <text:p text:style-name="Normal"><text:s text:c="4"/>&lt;/div&gt;</text:p>
      <text:p text:style-name="Normal"/>
      <text:p text:style-name="Normal"><text:s text:c="4"/>&lt;header&gt;</text:p>
      <text:p text:style-name="Normal"><text:s text:c="8"/>&lt;div class="container navbar"&gt;</text:p>
      <text:p text:style-name="Normal"><text:s text:c="12"/>&lt;a href="#" class="logo" onclick="switchSection('home')"&gt;</text:p>
      <text:p text:style-name="Normal"><text:s text:c="16"/>&lt;i class="fa-solid fa-graduation-cap"&gt;&lt;/i&gt; Sinhala Notes</text:p>
      <text:p text:style-name="Normal"><text:s text:c="12"/>&lt;/a&gt;</text:p>
      <text:p text:style-name="Normal"><text:s text:c="12"/>&lt;ul class="nav-links" id="navLinks"&gt;</text:p>
      <text:p text:style-name="Normal"><text:s text:c="16"/>&lt;li&gt;&lt;a onclick="switchSection('home')" class="nav-item active" id="nav-home"&gt;Home&lt;/a&gt;&lt;/li&gt;</text:p>
      <text:p text:style-name="Normal"><text:s text:c="16"/>&lt;li&gt;&lt;a onclick="switchSection('notes')" class="nav-item" id="nav-notes"&gt;Notes&lt;/a&gt;&lt;/li&gt;</text:p>
      <text:p text:style-name="Normal"><text:s text:c="16"/>&lt;li&gt;&lt;a onclick="switchSection('pastpapers')" class="nav-item" id="nav-pastpapers"&gt;Past Papers&lt;/a&gt;&lt;/li&gt;</text:p>
      <text:p text:style-name="Normal"><text:s text:c="16"/>&lt;li&gt;&lt;a onclick="switchSection('tutorials')" class="nav-item" id="nav-tutorials"&gt;Tutorials&lt;/a&gt;&lt;/li&gt;</text:p>
      <text:p text:style-name="Normal"><text:s text:c="16"/>&lt;li&gt;&lt;a onclick="switchSection('contact')" class="nav-item" id="nav-contact"&gt;Contact&lt;/a&gt;&lt;/li&gt;</text:p>
      <text:p text:style-name="Normal"><text:s text:c="12"/>&lt;/ul&gt;</text:p>
      <text:p text:style-name="Normal"><text:s text:c="12"/>&lt;div class="nav-actions"&gt;</text:p>
      <text:p text:style-name="Normal"><text:s text:c="16"/>&lt;button class="theme-toggle" id="themeToggle" title="Toggle Dark/Light Mode"&gt;</text:p>
      <text:p text:style-name="Normal"><text:s text:c="20"/>&lt;i class="fa-solid fa-moon"&gt;&lt;/i&gt;</text:p>
      <text:p text:style-name="Normal"><text:s text:c="16"/>&lt;/button&gt;</text:p>
      <text:p text:style-name="Normal"><text:s text:c="16"/>&lt;button class="menu-toggle" id="menuToggle"&gt;</text:p>
      <text:p text:style-name="Normal"><text:s text:c="20"/>&lt;i class="fa-solid fa-bars"&gt;&lt;/i&gt;</text:p>
      <text:p text:style-name="Normal"><text:s text:c="16"/>&lt;/button&gt;</text:p>
      <text:p text:style-name="Normal"><text:s text:c="12"/>&lt;/div&gt;</text:p>
      <text:p text:style-name="Normal"><text:s text:c="8"/>&lt;/div&gt;</text:p>
      <text:p text:style-name="Normal"><text:s text:c="4"/>&lt;/header&gt;</text:p>
      <text:p text:style-name="Normal"/>
      <text:p text:style-name="Normal"><text:s text:c="4"/>&lt;main id="home-section" class="app-section active-section"&gt;</text:p>
      <text:p text:style-name="Normal"><text:s text:c="8"/>&lt;div class="container"&gt;</text:p>
      <text:p text:style-name="Normal"><text:s text:c="12"/>&lt;section class="hero"&gt;</text:p>
      <text:p text:style-name="Normal"><text:s text:c="16"/>&lt;div class="hero-text"&gt;</text:p>
      <text:p text:style-name="Normal"><text:s text:c="20"/>&lt;h1&gt;&lt;span&gt;Sinhala Notes&lt;/span&gt;&lt;br&gt;Learn Smarter, Achieve Higher&lt;/h1&gt;</text:p>
      <text:p text:style-name="Normal"><text:s text:c="20"/>&lt;p&gt;Access high-quality school study notes, real past exam papers, and comprehensive tutorials completely optimized for Sri Lankan students.&lt;/p&gt;</text:p>
      <text:p text:style-name="Normal"><text:s text:c="20"/>&lt;div class="hero-buttons"&gt;</text:p>
      <text:p text:style-name="Normal"><text:s text:c="24"/>&lt;button class="btn btn-primary" onclick="switchSection('notes')"&gt;&lt;i class="fa-solid fa-book-open"&gt;&lt;/i&gt; View Notes&lt;/button&gt;</text:p>
      <text:p text:style-name="Normal"><text:s text:c="24"/>&lt;button class="btn btn-secondary" onclick="switchSection('pastpapers')"&gt;&lt;i class="fa-solid fa-file-arrow-down"&gt;&lt;/i&gt; Download Papers&lt;/button&gt;</text:p>
      <text:p text:style-name="Normal"><text:s text:c="20"/>&lt;/div&gt;</text:p>
      <text:p text:style-name="Normal"><text:s text:c="16"/>&lt;/div&gt;</text:p>
      <text:p text:style-name="Normal"><text:s text:c="16"/>&lt;div class="hero-image"&gt;</text:p>
      <text:p text:style-name="Normal"><text:s text:c="20"/>&lt;svg viewBox="0 0 500 500" width="100%" height="100%" xmlns="http://www.w3.org/2000/svg"&gt;</text:p>
      <text:p text:style-name="Normal"><text:s text:c="24"/>&lt;circle cx="250" cy="250" r="180" fill="rgba(2, 132, 199, 0.1)" /&gt;</text:p>
      <text:p text:style-name="Normal"><text:s text:c="24"/>&lt;rect x="140" y="160" width="220" height="200" rx="15" fill="#0284c7" /&gt;</text:p>
      <text:p text:style-name="Normal"><text:s text:c="24"/>&lt;rect x="160" y="180" width="180" height="160" rx="10" fill="#ffffff" /&gt;</text:p>
      <text:p text:style-name="Normal"><text:s text:c="24"/>&lt;line x1="180" y1="210" x2="320" y2="210" stroke="#475569" stroke-width="6" stroke-linecap="round" /&gt;</text:p>
      <text:p text:style-name="Normal"><text:s text:c="24"/>&lt;line x1="180" y1="240" x2="280" y2="240" stroke="#475569" stroke-width="6" stroke-linecap="round" /&gt;</text:p>
      <text:p text:style-name="Normal"><text:s text:c="24"/>&lt;line x1="180" y1="270" x2="300" y2="270" stroke="#475569" stroke-width="6" stroke-linecap="round" /&gt;</text:p>
      <text:p text:style-name="Normal"><text:s text:c="24"/>&lt;circle cx="380" cy="140" r="30" fill="#0ea5e9" /&gt;</text:p>
      <text:p text:style-name="Normal"><text:s text:c="24"/>&lt;path d="M370 140 L380 150 L395 130" stroke="white" stroke-width="4" fill="none" stroke-linecap="round"/&gt;</text:p>
      <text:p text:style-name="Normal"><text:s text:c="24"/>&lt;polygon points="100,280 140,250 140,310" fill="#f59e0b" /&gt;</text:p>
      <text:p text:style-name="Normal"><text:s text:c="20"/>&lt;/svg&gt;</text:p>
      <text:p text:style-name="Normal"><text:s text:c="16"/>&lt;/div&gt;</text:p>
      <text:p text:style-name="Normal"><text:s text:c="12"/>&lt;/section&gt;</text:p>
      <text:p text:style-name="Normal"/>
      <text:p text:style-name="Normal"><text:s text:c="12"/>&lt;section class="stats-grid"&gt;</text:p>
      <text:p text:style-name="Normal"><text:s text:c="16"/>&lt;div class="stat-card"&gt;</text:p>
      <text:p text:style-name="Normal"><text:s text:c="20"/>&lt;i class="fa-solid fa-users"&gt;&lt;/i&gt;</text:p>
      <text:p text:style-name="Normal"><text:s text:c="20"/>&lt;h3 class="counter" data-target="15000"&gt;0&lt;/h3&gt;</text:p>
      <text:p text:style-name="Normal"><text:s text:c="20"/>&lt;p&gt;Active Students&lt;/p&gt;</text:p>
      <text:p text:style-name="Normal"><text:s text:c="16"/>&lt;/div&gt;</text:p>
      <text:p text:style-name="Normal"><text:s text:c="16"/>&lt;div class="stat-card"&gt;</text:p>
      <text:p text:style-name="Normal"><text:s text:c="20"/>&lt;i class="fa-solid fa-file-lines"&gt;&lt;/i&gt;</text:p>
      <text:p text:style-name="Normal"><text:s text:c="20"/>&lt;h3 class="counter" data-target="1200"&gt;0&lt;/h3&gt;</text:p>
      <text:p text:style-name="Normal"><text:s text:c="20"/>&lt;p&gt;Study Notes&lt;/p&gt;</text:p>
      <text:p text:style-name="Normal"><text:s text:c="16"/>&lt;/div&gt;</text:p>
      <text:p text:style-name="Normal"><text:s text:c="16"/>&lt;div class="stat-card"&gt;</text:p>
      <text:p text:style-name="Normal"><text:s text:c="20"/>&lt;i class="fa-solid fa-circle-down"&gt;&lt;/i&gt;</text:p>
      <text:p text:style-name="Normal"><text:s text:c="20"/>&lt;h3 class="counter" data-target="45000"&gt;0&lt;/h3&gt;</text:p>
      <text:p text:style-name="Normal"><text:s text:c="20"/>&lt;p&gt;Resource Downloads&lt;/p&gt;</text:p>
      <text:p text:style-name="Normal"><text:s text:c="16"/>&lt;/div&gt;</text:p>
      <text:p text:style-name="Normal"><text:s text:c="12"/>&lt;/section&gt;</text:p>
      <text:p text:style-name="Normal"/>
      <text:p text:style-name="Normal"><text:s text:c="12"/>&lt;section style="margin-top: 60px;"&gt;</text:p>
      <text:p text:style-name="Normal"><text:s text:c="16"/>&lt;div class="section-header"&gt;</text:p>
      <text:p text:style-name="Normal"><text:s text:c="20"/>&lt;h2&gt;Featured Subjects&lt;/h2&gt;</text:p>
      <text:p text:style-name="Normal"><text:s text:c="20"/>&lt;p&gt;Explore resources curated systematically across vital academic streams.&lt;/p&gt;</text:p>
      <text:p text:style-name="Normal"><text:s text:c="16"/>&lt;/div&gt;</text:p>
      <text:p text:style-name="Normal"><text:s text:c="16"/>&lt;div class="grid-3"&gt;</text:p>
      <text:p text:style-name="Normal"><text:s text:c="20"/>&lt;div class="card subject-card" onclick="openSubject('Science')"&gt;</text:p>
      <text:p text:style-name="Normal"><text:s text:c="24"/>&lt;i class="fa-solid fa-flask"&gt;&lt;/i&gt;</text:p>
      <text:p text:style-name="Normal"><text:s text:c="24"/>&lt;h3&gt;Science&lt;/h3&gt;</text:p>
      <text:p text:style-name="Normal"><text:s text:c="24"/>&lt;p&gt;Explore physics, chemistry, and biology notes.&lt;/p&gt;</text:p>
      <text:p text:style-name="Normal"><text:s text:c="20"/>&lt;/div&gt;</text:p>
      <text:p text:style-name="Normal"><text:s text:c="20"/>&lt;div class="card subject-card" onclick="openSubject('Mathematics')"&gt;</text:p>
      <text:p text:style-name="Normal"><text:s text:c="24"/>&lt;i class="fa-solid fa-calculator"&gt;&lt;/i&gt;</text:p>
      <text:p text:style-name="Normal"><text:s text:c="24"/>&lt;h3&gt;Mathematics&lt;/h3&gt;</text:p>
      <text:p text:style-name="Normal"><text:s text:c="24"/>&lt;p&gt;Master mathematical equations and theories cleanly.&lt;/p&gt;</text:p>
      <text:p text:style-name="Normal"><text:s text:c="20"/>&lt;/div&gt;</text:p>
      <text:p text:style-name="Normal"><text:s text:c="20"/>&lt;div class="card subject-card" onclick="openSubject('History')"&gt;</text:p>
      <text:p text:style-name="Normal"><text:s text:c="24"/>&lt;i class="fa-solid fa-timeline"&gt;&lt;/i&gt;</text:p>
      <text:p text:style-name="Normal"><text:s text:c="24"/>&lt;h3&gt;History&lt;/h3&gt;</text:p>
      <text:p text:style-name="Normal"><text:s text:c="24"/>&lt;p&gt;Dive into history timelines and structured evaluations.&lt;/p&gt;</text:p>
      <text:p text:style-name="Normal"><text:s text:c="20"/>&lt;/div&gt;</text:p>
      <text:p text:style-name="Normal"><text:s text:c="16"/>&lt;/div&gt;</text:p>
      <text:p text:style-name="Normal"><text:s text:c="12"/>&lt;/section&gt;</text:p>
      <text:p text:style-name="Normal"/>
      <text:p text:style-name="Normal"><text:s text:c="12"/>&lt;section style="margin-top: 80px;"&gt;</text:p>
      <text:p text:style-name="Normal"><text:s text:c="16"/>&lt;div class="section-header"&gt;</text:p>
      <text:p text:style-name="Normal"><text:s text:c="20"/>&lt;h2&gt;Featured Study Tips&lt;/h2&gt;</text:p>
      <text:p text:style-name="Normal"><text:s text:c="20"/>&lt;p&gt;Maximize your retention rate and exam efficiency.&lt;/p&gt;</text:p>
      <text:p text:style-name="Normal"><text:s text:c="16"/>&lt;/div&gt;</text:p>
      <text:p text:style-name="Normal"><text:s text:c="16"/>&lt;div class="slider-container"&gt;</text:p>
      <text:p text:style-name="Normal"><text:s text:c="20"/>&lt;div class="slide active-slide"&gt;</text:p>
      <text:p text:style-name="Normal"><text:s text:c="24"/>&lt;i class="fa-solid fa-lightbulb"&gt;&lt;/i&gt;</text:p>
      <text:p text:style-name="Normal"><text:s text:c="24"/>&lt;p&gt;"Use the Pomodoro Technique: Study fully focused for 25 minutes, then reward yourself with a 5-minute breather."&lt;/p&gt;</text:p>
      <text:p text:style-name="Normal"><text:s text:c="24"/>&lt;h5&gt;- Expert Academic Advice&lt;/h5&gt;</text:p>
      <text:p text:style-name="Normal"><text:s text:c="20"/>&lt;/div&gt;</text:p>
      <text:p text:style-name="Normal"><text:s text:c="20"/>&lt;div class="slide"&gt;</text:p>
      <text:p text:style-name="Normal"><text:s text:c="24"/>&lt;i class="fa-solid fa-pen-fancy"&gt;&lt;/i&gt;</text:p>
      <text:p text:style-name="Normal"><text:s text:c="24"/>&lt;p&gt;"Active recall beats passive reading every time. Flashcards and self-quizzing lock concepts into memory long-term."&lt;/p&gt;</text:p>
      <text:p text:style-name="Normal"><text:s text:c="24"/>&lt;h5&gt;- O/L Top Ranker Tip&lt;/h5&gt;</text:p>
      <text:p text:style-name="Normal"><text:s text:c="20"/>&lt;/div&gt;</text:p>
      <text:p text:style-name="Normal"><text:s text:c="16"/>&lt;/div&gt;</text:p>
      <text:p text:style-name="Normal"><text:s text:c="12"/>&lt;/section&gt;</text:p>
      <text:p text:style-name="Normal"/>
      <text:p text:style-name="Normal"><text:s text:c="12"/>&lt;section style="margin-top: 80px;"&gt;</text:p>
      <text:p text:style-name="Normal"><text:s text:c="16"/>&lt;div class="section-header"&gt;</text:p>
      <text:p text:style-name="Normal"><text:s text:c="20"/>&lt;h2&gt;Frequently Asked Questions&lt;/h2&gt;</text:p>
      <text:p text:style-name="Normal"><text:s text:c="20"/>&lt;p&gt;Everything you need to know about navigating the Sinhala Notes layout.&lt;/p&gt;</text:p>
      <text:p text:style-name="Normal"><text:s text:c="16"/>&lt;/div&gt;</text:p>
      <text:p text:style-name="Normal"><text:s text:c="16"/>&lt;div class="faq-wrapper"&gt;</text:p>
      <text:p text:style-name="Normal"><text:s text:c="20"/>&lt;div class="faq-item"&gt;</text:p>
      <text:p text:style-name="Normal"><text:s text:c="24"/>&lt;div class="faq-header"&gt;Are all resources downloadable for free? &lt;i class="fa-solid fa-chevron-down"&gt;&lt;/i&gt;&lt;/div&gt;</text:p>
      <text:p text:style-name="Normal"><text:s text:c="24"/>&lt;div class="faq-body"&gt;Yes, absolutely. All PDF structural notes, mock materials, and past paper modules are free to use.&lt;/div&gt;</text:p>
      <text:p text:style-name="Normal"><text:s text:c="20"/>&lt;/div&gt;</text:p>
      <text:p text:style-name="Normal"><text:s text:c="20"/>&lt;div class="faq-item"&gt;</text:p>
      <text:p text:style-name="Normal"><text:s text:c="24"/>&lt;div class="faq-header"&gt;Does the site track my downloads? &lt;i class="fa-solid fa-chevron-down"&gt;&lt;/i&gt;&lt;/div&gt;</text:p>
      <text:p text:style-name="Normal"><text:s text:c="24"/>&lt;div class="faq-body"&gt;We maintain anonymous analytical counts globally to dynamically feature highly-rated files back to users.&lt;/div&gt;</text:p>
      <text:p text:style-name="Normal"><text:s text:c="20"/>&lt;/div&gt;</text:p>
      <text:p text:style-name="Normal"><text:s text:c="16"/>&lt;/div&gt;</text:p>
      <text:p text:style-name="Normal"><text:s text:c="12"/>&lt;/section&gt;</text:p>
      <text:p text:style-name="Normal"><text:s text:c="8"/>&lt;/div&gt;</text:p>
      <text:p text:style-name="Normal"><text:s text:c="4"/>&lt;/main&gt;</text:p>
      <text:p text:style-name="Normal"/>
      <text:p text:style-name="Normal"><text:s text:c="4"/>&lt;main id="notes-section" class="app-section"&gt;</text:p>
      <text:p text:style-name="Normal"><text:s text:c="8"/>&lt;div class="container"&gt;</text:p>
      <text:p text:style-name="Normal"><text:s text:c="12"/>&lt;div class="section-header"&gt;</text:p>
      <text:p text:style-name="Normal"><text:s text:c="16"/>&lt;h2&gt;Study Notes Hub&lt;/h2&gt;</text:p>
      <text:p text:style-name="Normal"><text:s text:c="16"/>&lt;p&gt;Filter by grade system or select target subjects to begin immediate downloads.&lt;/p&gt;</text:p>
      <text:p text:style-name="Normal"><text:s text:c="12"/>&lt;/div&gt;</text:p>
      <text:p text:style-name="Normal"><text:s text:c="12"/></text:p>
      <text:p text:style-name="Normal"><text:s text:c="12"/>&lt;div class="search-filter-wrapper"&gt;</text:p>
      <text:p text:style-name="Normal"><text:s text:c="16"/>&lt;div class="search-box"&gt;</text:p>
      <text:p text:style-name="Normal"><text:s text:c="20"/>&lt;i class="fa-solid fa-magnifying-glass"&gt;&lt;/i&gt;</text:p>
      <text:p text:style-name="Normal"><text:s text:c="20"/>&lt;input type="text" id="notesSearch" placeholder="Search school syllabus notes by keywords..."&gt;</text:p>
      <text:p text:style-name="Normal"><text:s text:c="16"/>&lt;/div&gt;</text:p>
      <text:p text:style-name="Normal"><text:s text:c="16"/>&lt;div class="filter-group"&gt;</text:p>
      <text:p text:style-name="Normal"><text:s text:c="20"/>&lt;span class="filter-label"&gt;Grade:&lt;/span&gt;</text:p>
      <text:p text:style-name="Normal"><text:s text:c="20"/>&lt;button class="filter-btn active" data-filter="grade" data-value="all"&gt;All Grades&lt;/button&gt;</text:p>
      <text:p text:style-name="Normal"><text:s text:c="20"/>&lt;button class="filter-btn" data-filter="grade" data-value="Grade 6"&gt;Grade 6&lt;/button&gt;</text:p>
      <text:p text:style-name="Normal"><text:s text:c="20"/>&lt;button class="filter-btn" data-filter="grade" data-value="Grade 7"&gt;Grade 7&lt;/button&gt;</text:p>
      <text:p text:style-name="Normal"><text:s text:c="20"/>&lt;button class="filter-btn" data-filter="grade" data-value="Grade 8"&gt;Grade 8&lt;/button&gt;</text:p>
      <text:p text:style-name="Normal"><text:s text:c="20"/>&lt;button class="filter-btn" data-filter="grade" data-value="Grade 9"&gt;Grade 9&lt;/button&gt;</text:p>
      <text:p text:style-name="Normal"><text:s text:c="20"/>&lt;button class="filter-btn" data-filter="grade" data-value="Grade 10"&gt;Grade 10&lt;/button&gt;</text:p>
      <text:p text:style-name="Normal"><text:s text:c="20"/>&lt;button class="filter-btn" data-filter="grade" data-value="Grade 11"&gt;Grade 11&lt;/button&gt;</text:p>
      <text:p text:style-name="Normal"><text:s text:c="16"/>&lt;/div&gt;</text:p>
      <text:p text:style-name="Normal"><text:s text:c="16"/>&lt;div class="filter-group"&gt;</text:p>
      <text:p text:style-name="Normal"><text:s text:c="20"/>&lt;span class="filter-label"&gt;Subject:&lt;/span&gt;</text:p>
      <text:p text:style-name="Normal"><text:s text:c="20"/>&lt;button class="filter-btn active" data-filter="subject" data-value="all"&gt;All Subjects&lt;/button&gt;</text:p>
      <text:p text:style-name="Normal"><text:s text:c="20"/>&lt;button class="filter-btn" data-filter="subject" data-value="Sinhala"&gt;Sinhala&lt;/button&gt;</text:p>
      <text:p text:style-name="Normal"><text:s text:c="20"/>&lt;button class="filter-btn" data-filter="subject" data-value="Mathematics"&gt;Mathematics&lt;/button&gt;</text:p>
      <text:p text:style-name="Normal"><text:s text:c="20"/>&lt;button class="filter-btn" data-filter="subject" data-value="Science"&gt;Science&lt;/button&gt;</text:p>
      <text:p text:style-name="Normal"><text:s text:c="20"/>&lt;button class="filter-btn" data-filter="subject" data-value="History"&gt;History&lt;/button&gt;</text:p>
      <text:p text:style-name="Normal"><text:s text:c="20"/>&lt;button class="filter-btn" data-filter="subject" data-value="English"&gt;English&lt;/button&gt;</text:p>
      <text:p text:style-name="Normal"><text:s text:c="20"/>&lt;button class="filter-btn" data-filter="subject" data-value="ICT"&gt;ICT&lt;/button&gt;</text:p>
      <text:p text:style-name="Normal"><text:s text:c="16"/>&lt;/div&gt;</text:p>
      <text:p text:style-name="Normal"><text:s text:c="12"/>&lt;/div&gt;</text:p>
      <text:p text:style-name="Normal"/>
      <text:p text:style-name="Normal"><text:s text:c="12"/>&lt;div class="grid-3" id="notesGrid"&gt;</text:p>
      <text:p text:style-name="Normal"><text:s text:c="16"/>&lt;/div&gt;</text:p>
      <text:p text:style-name="Normal"><text:s text:c="8"/>&lt;/div&gt;</text:p>
      <text:p text:style-name="Normal"><text:s text:c="4"/>&lt;/main&gt;</text:p>
      <text:p text:style-name="Normal"/>
      <text:p text:style-name="Normal"><text:s text:c="4"/>&lt;main id="pastpapers-section" class="app-section"&gt;</text:p>
      <text:p text:style-name="Normal"><text:s text:c="8"/>&lt;div class="container"&gt;</text:p>
      <text:p text:style-name="Normal"><text:s text:c="12"/>&lt;div class="section-header"&gt;</text:p>
      <text:p text:style-name="Normal"><text:s text:c="16"/>&lt;h2&gt;Examination Past Papers&lt;/h2&gt;</text:p>
      <text:p text:style-name="Normal"><text:s text:c="16"/>&lt;p&gt;Official O/L examination papers along with regional tests available structurally.&lt;/p&gt;</text:p>
      <text:p text:style-name="Normal"><text:s text:c="12"/>&lt;/div&gt;</text:p>
      <text:p text:style-name="Normal"/>
      <text:p text:style-name="Normal"><text:s text:c="12"/>&lt;div class="search-filter-wrapper"&gt;</text:p>
      <text:p text:style-name="Normal"><text:s text:c="16"/>&lt;div class="search-box"&gt;</text:p>
      <text:p text:style-name="Normal"><text:s text:c="20"/>&lt;i class="fa-solid fa-magnifying-glass"&gt;&lt;/i&gt;</text:p>
      <text:p text:style-name="Normal"><text:s text:c="20"/>&lt;input type="text" id="papersSearch" placeholder="Search papers (e.g., O/L 2024, Mathematics)..."&gt;</text:p>
      <text:p text:style-name="Normal"><text:s text:c="16"/>&lt;/div&gt;</text:p>
      <text:p text:style-name="Normal"><text:s text:c="12"/>&lt;/div&gt;</text:p>
      <text:p text:style-name="Normal"/>
      <text:p text:style-name="Normal"><text:s text:c="12"/>&lt;div class="grid-3" id="papersGrid"&gt;</text:p>
      <text:p text:style-name="Normal"><text:s text:c="16"/>&lt;/div&gt;</text:p>
      <text:p text:style-name="Normal"><text:s text:c="8"/>&lt;/div&gt;</text:p>
      <text:p text:style-name="Normal"><text:s text:c="4"/>&lt;/main&gt;</text:p>
      <text:p text:style-name="Normal"/>
      <text:p text:style-name="Normal"><text:s text:c="4"/>&lt;main id="tutorials-section" class="app-section"&gt;</text:p>
      <text:p text:style-name="Normal"><text:s text:c="8"/>&lt;div class="container"&gt;</text:p>
      <text:p text:style-name="Normal"><text:s text:c="12"/>&lt;div class="section-header"&gt;</text:p>
      <text:p text:style-name="Normal"><text:s text:c="16"/>&lt;h2&gt;Tutorials &amp; Exam Strategies&lt;/h2&gt;</text:p>
      <text:p text:style-name="Normal"><text:s text:c="16"/>&lt;p&gt;Master the curriculum via specialized guides written by veteran teachers.&lt;/p&gt;</text:p>
      <text:p text:style-name="Normal"><text:s text:c="12"/>&lt;/div&gt;</text:p>
      <text:p text:style-name="Normal"><text:s text:c="12"/>&lt;div class="grid-3" id="tutorialsGrid"&gt;</text:p>
      <text:p text:style-name="Normal"><text:s text:c="16"/>&lt;/div&gt;</text:p>
      <text:p text:style-name="Normal"><text:s text:c="8"/>&lt;/div&gt;</text:p>
      <text:p text:style-name="Normal"><text:s text:c="4"/>&lt;/main&gt;</text:p>
      <text:p text:style-name="Normal"/>
      <text:p text:style-name="Normal"><text:s text:c="4"/>&lt;main id="contact-section" class="app-section"&gt;</text:p>
      <text:p text:style-name="Normal"><text:s text:c="8"/>&lt;div class="container"&gt;</text:p>
      <text:p text:style-name="Normal"><text:s text:c="12"/>&lt;div class="section-header"&gt;</text:p>
      <text:p text:style-name="Normal"><text:s text:c="16"/>&lt;h2&gt;Get In Touch&lt;/h2&gt;</text:p>
      <text:p text:style-name="Normal"><text:s text:c="16"/>&lt;p&gt;Have recommendations or looking to donate notes? Contact our backend support desk.&lt;/p&gt;</text:p>
      <text:p text:style-name="Normal"><text:s text:c="12"/>&lt;/div&gt;</text:p>
      <text:p text:style-name="Normal"><text:s text:c="12"/>&lt;div class="contact-wrapper"&gt;</text:p>
      <text:p text:style-name="Normal"><text:s text:c="16"/>&lt;form class="contact-form" id="contactForm"&gt;</text:p>
      <text:p text:style-name="Normal"><text:s text:c="20"/>&lt;div class="form-group"&gt;</text:p>
      <text:p text:style-name="Normal"><text:s text:c="24"/>&lt;label for="name"&gt;Your Name&lt;/label&gt;</text:p>
      <text:p text:style-name="Normal"><text:s text:c="24"/>&lt;input type="text" id="name" required placeholder="Enter your full name"&gt;</text:p>
      <text:p text:style-name="Normal"><text:s text:c="20"/>&lt;/div&gt;</text:p>
      <text:p text:style-name="Normal"><text:s text:c="20"/>&lt;div class="form-group"&gt;</text:p>
      <text:p text:style-name="Normal"><text:s text:c="24"/>&lt;label for="email"&gt;Email Address&lt;/label&gt;</text:p>
      <text:p text:style-name="Normal"><text:s text:c="24"/>&lt;input type="email" id="email" required placeholder="name@example.com"&gt;</text:p>
      <text:p text:style-name="Normal"><text:s text:c="20"/>&lt;/div&gt;</text:p>
      <text:p text:style-name="Normal"><text:s text:c="20"/>&lt;div class="form-group"&gt;</text:p>
      <text:p text:style-name="Normal"><text:s text:c="24"/>&lt;label for="message"&gt;Message&lt;/label&gt;</text:p>
      <text:p text:style-name="Normal"><text:s text:c="24"/>&lt;textarea id="message" rows="5" required placeholder="Write your message here..."&gt;&lt;/textarea&gt;</text:p>
      <text:p text:style-name="Normal"><text:s text:c="20"/>&lt;/div&gt;</text:p>
      <text:p text:style-name="Normal"><text:s text:c="20"/>&lt;button type="submit" class="btn btn-primary"&gt;&lt;i class="fa-solid fa-paper-plane"&gt;&lt;/i&gt; Send Message&lt;/button&gt;</text:p>
      <text:p text:style-name="Normal"><text:s text:c="16"/>&lt;/form&gt;</text:p>
      <text:p text:style-name="Normal"/>
      <text:p text:style-name="Normal"><text:s text:c="16"/>&lt;div class="map-placeholder"&gt;</text:p>
      <text:p text:style-name="Normal"><text:s text:c="20"/>&lt;i class="fa-solid fa-map-location-dot" style="font-size: 48px; color: var(--primary);"&gt;&lt;/i&gt;</text:p>
      <text:p text:style-name="Normal"><text:s text:c="20"/>&lt;h3&gt;Colombo, Sri Lanka&lt;/h3&gt;</text:p>
      <text:p text:style-name="Normal"><text:s text:c="20"/>&lt;p&gt;Digital Distribution Node. 24/7 Educational Delivery Matrix.&lt;/p&gt;</text:p>
      <text:p text:style-name="Normal"><text:s text:c="20"/>&lt;div style="width:100%; height:200px; background: rgba(0,0,0,0.05); border-radius: 8px; margin-top: 15px; border: 2px dashed var(--border);"&gt;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><text:s text:c="4"/>&lt;/main&gt;</text:p>
      <text:p text:style-name="Normal"/>
      <text:p text:style-name="Normal"><text:s text:c="4"/>&lt;section class="newsletter-bar"&gt;</text:p>
      <text:p text:style-name="Normal"><text:s text:c="8"/>&lt;div class="container"&gt;</text:p>
      <text:p text:style-name="Normal"><text:s text:c="12"/>&lt;h3&gt;Subscribe to Our Student Newsletter&lt;/h3&gt;</text:p>
      <text:p text:style-name="Normal"><text:s text:c="12"/>&lt;p&gt;Get instant email updates regarding newly released syllabus updates and local mock exams.&lt;/p&gt;</text:p>
      <text:p text:style-name="Normal"><text:s text:c="12"/>&lt;form class="newsletter-form" id="newsletterForm"&gt;</text:p>
      <text:p text:style-name="Normal"><text:s text:c="16"/>&lt;input type="email" placeholder="Enter your best educational email" required&gt;</text:p>
      <text:p text:style-name="Normal"><text:s text:c="16"/>&lt;button type="submit" class="btn btn-secondary"&gt;Subscribe&lt;/button&gt;</text:p>
      <text:p text:style-name="Normal"><text:s text:c="12"/>&lt;/form&gt;</text:p>
      <text:p text:style-name="Normal"><text:s text:c="8"/>&lt;/div&gt;</text:p>
      <text:p text:style-name="Normal"><text:s text:c="4"/>&lt;/section&gt;</text:p>
      <text:p text:style-name="Normal"/>
      <text:p text:style-name="Normal"><text:s text:c="4"/>&lt;footer&gt;</text:p>
      <text:p text:style-name="Normal"><text:s text:c="8"/>&lt;div class="container footer-grid"&gt;</text:p>
      <text:p text:style-name="Normal"><text:s text:c="12"/>&lt;div class="footer-brand"&gt;</text:p>
      <text:p text:style-name="Normal"><text:s text:c="16"/>&lt;h3&gt;Sinhala Notes&lt;/h3&gt;</text:p>
      <text:p text:style-name="Normal"><text:s text:c="16"/>&lt;p&gt;A comprehensive public repository system serving local grade systems throughout Sri Lanka since inception. Aim high, prepare thoroughly.&lt;/p&gt;</text:p>
      <text:p text:style-name="Normal"><text:s text:c="16"/>&lt;div class="social-icons"&gt;</text:p>
      <text:p text:style-name="Normal"><text:s text:c="20"/>&lt;a href="#"&gt;&lt;i class="fa-brands fa-facebook"&gt;&lt;/i&gt;&lt;/a&gt;</text:p>
      <text:p text:style-name="Normal"><text:s text:c="20"/>&lt;a href="#"&gt;&lt;i class="fa-brands fa-youtube"&gt;&lt;/i&gt;&lt;/a&gt;</text:p>
      <text:p text:style-name="Normal"><text:s text:c="20"/>&lt;a href="#"&gt;&lt;i class="fa-brands fa-telegram"&gt;&lt;/i&gt;&lt;/a&gt;</text:p>
      <text:p text:style-name="Normal"><text:s text:c="16"/>&lt;/div&gt;</text:p>
      <text:p text:style-name="Normal"><text:s text:c="12"/>&lt;/div&gt;</text:p>
      <text:p text:style-name="Normal"><text:s text:c="12"/>&lt;div class="footer-links"&gt;</text:p>
      <text:p text:style-name="Normal"><text:s text:c="16"/>&lt;h4&gt;Resource Ecosystem&lt;/h4&gt;</text:p>
      <text:p text:style-name="Normal"><text:s text:c="16"/>&lt;ul&gt;</text:p>
      <text:p text:style-name="Normal"><text:s text:c="20"/>&lt;li&gt;&lt;a onclick="switchSection('notes')"&gt;School Syllabus Notes&lt;/a&gt;&lt;/li&gt;</text:p>
      <text:p text:style-name="Normal"><text:s text:c="20"/>&lt;li&gt;&lt;a onclick="switchSection('pastpapers')"&gt;O/L National Papers&lt;/a&gt;&lt;/li&gt;</text:p>
      <text:p text:style-name="Normal"><text:s text:c="20"/>&lt;li&gt;&lt;a onclick="switchSection('tutorials')"&gt;Preparation Manuals&lt;/a&gt;&lt;/li&gt;</text:p>
      <text:p text:style-name="Normal"><text:s text:c="16"/>&lt;/ul&gt;</text:p>
      <text:p text:style-name="Normal"><text:s text:c="12"/>&lt;/div&gt;</text:p>
      <text:p text:style-name="Normal"><text:s text:c="12"/>&lt;div class="footer-links"&gt;</text:p>
      <text:p text:style-name="Normal"><text:s text:c="16"/>&lt;h4&gt;Quick Controls&lt;/h4&gt;</text:p>
      <text:p text:style-name="Normal"><text:s text:c="16"/>&lt;ul&gt;</text:p>
      <text:p text:style-name="Normal"><text:s text:c="20"/>&lt;li&gt;&lt;a onclick="switchSection('contact')"&gt;Support Desk&lt;/a&gt;&lt;/li&gt;</text:p>
      <text:p text:style-name="Normal"><text:s text:c="20"/>&lt;li&gt;&lt;a href="#" onclick="window.scrollTo({top: 0});"&gt;Back to Top&lt;/a&gt;&lt;/li&gt;</text:p>
      <text:p text:style-name="Normal"><text:s text:c="16"/>&lt;/ul&gt;</text:p>
      <text:p text:style-name="Normal"><text:s text:c="12"/>&lt;/div&gt;</text:p>
      <text:p text:style-name="Normal"><text:s text:c="8"/>&lt;/div&gt;</text:p>
      <text:p text:style-name="Normal"><text:s text:c="8"/>&lt;div class="footer-bottom"&gt;</text:p>
      <text:p text:style-name="Normal"><text:s text:c="12"/>&lt;p&gt;&amp;copy; 2026 Sinhala Notes platform. Built for absolute student acceleration.&lt;/p&gt;</text:p>
      <text:p text:style-name="Normal"><text:s text:c="8"/>&lt;/div&gt;</text:p>
      <text:p text:style-name="Normal"><text:s text:c="4"/>&lt;/footer&gt;</text:p>
      <text:p text:style-name="Normal"/>
      <text:p text:style-name="Normal"><text:s text:c="4"/>&lt;div class="scroll-top" id="scrollTopBtn"&gt;</text:p>
      <text:p text:style-name="Normal"><text:s text:c="8"/>&lt;i class="fa-solid fa-arrow-up"&gt;&lt;/i&gt;</text:p>
      <text:p text:style-name="Normal"><text:s text:c="4"/>&lt;/div&gt;</text:p>
      <text:p text:style-name="Normal"/>
      <text:p text:style-name="Normal"><text:s text:c="4"/>&lt;script&gt;</text:p>
      <text:p text:style-name="Normal"><text:s text:c="8"/>/* --- CORE DATA SCHEMAS (PRODUCTION DATA GENERATOR) --- */</text:p>
      <text:p text:style-name="Normal"><text:s text:c="8"/>const mockNotes = [</text:p>
      <text:p text:style-name="Normal"><text:s text:c="12"/>{ id: 1, title: "Grade 11 Science - Plant Adaptations", grade: "Grade 11", subject: "Science", desc: "Detailed breakdown of micro-cellular behaviors and floral structures.", downloads: 1420 },</text:p>
      <text:p text:style-name="Normal"><text:s text:c="12"/>{ id: 2, title: "Grade 10 Mathematics - Trigonometry", grade: "Grade 10", subject: "Mathematics", desc: "Comprehensive structural geometric proofs and theorem mappings.", downloads: 938 },</text:p>
      <text:p text:style-name="Normal"><text:s text:c="12"/>{ id: 3, title: "Grade 11 History - Anuradhapura Kingdom", grade: "Grade 11", subject: "History", desc: "Socio-political context layout including local ancient structural networks.", downloads: 2104 },</text:p>
      <text:p text:style-name="Normal"><text:s text:c="12"/>{ id: 4, title: "Grade 9 ICT - Introduction to Programming", grade: "Grade 9", subject: "ICT", desc: "Foundational structure mapping algorithms and pseudocode examples.", downloads: 785 },</text:p>
      <text:p text:style-name="Normal"><text:s text:c="12"/>{ id: 5, title: "Grade 8 English - Tense Concord Syntax", grade: "Grade 8", subject: "English", desc: "Clean active vs passive structures optimized cleanly for examinations.", downloads: 412 },</text:p>
      <text:p text:style-name="Normal"><text:s text:c="12"/>{ id: 6, title: "Grade 7 Sinhala - Hela Vyakarana Rules", grade: "Grade 7", subject: "Sinhala", desc: "Classical core grammatical constraints compiled thoroughly.", downloads: 889 }</text:p>
      <text:p text:style-name="Normal"><text:s text:c="8"/>];</text:p>
      <text:p text:style-name="Normal"/>
      <text:p text:style-name="Normal"><text:s text:c="8"/>const mockPapers = [</text:p>
      <text:p text:style-name="Normal"><text:s text:c="12"/>{ id: 101, title: "2024 G.C.E O/L Science I &amp; II", type: "O/L Past Papers", year: "2024", downloads: 4500 },</text:p>
      <text:p text:style-name="Normal"><text:s text:c="12"/>{ id: 102, title: "2023 G.C.E O/L Mathematics Complete", type: "O/L Past Papers", year: "2023", downloads: 8910 },</text:p>
      <text:p text:style-name="Normal"><text:s text:c="12"/>{ id: 103, title: "Grade 11 History Term Evaluation Paper", type: "Grade-wise papers", year: "2025", downloads: 1205 }</text:p>
      <text:p text:style-name="Normal"><text:s text:c="8"/>];</text:p>
      <text:p text:style-name="Normal"/>
      <text:p text:style-name="Normal"><text:s text:c="8"/>const mockTutorials = [</text:p>
      <text:p text:style-name="Normal"><text:s text:c="12"/>{ id: 201, title: "How to Crack O/L Mathematics Time Allocation", category: "Exam Preparation Guides", readTime: "5 mins", desc: "Systematic modular approach detailing how exactly to section time inside the critical exam room." },</text:p>
      <text:p text:style-name="Normal"><text:s text:c="12"/>{ id: 202, title: "Top 10 Memory Hacks for History Revision Diagrams", category: "Study Tips", readTime: "8 mins", desc: "Learn to deploy ancient structural spatial mnemonic tools to map kingdom successions elegantly." }</text:p>
      <text:p text:style-name="Normal"><text:s text:c="8"/>];</text:p>
      <text:p text:style-name="Normal"/>
      <text:p text:style-name="Normal"><text:s text:c="8"/>// Filtering State trackers</text:p>
      <text:p text:style-name="Normal"><text:s text:c="8"/>let activeGradeFilter = "all";</text:p>
      <text:p text:style-name="Normal"><text:s text:c="8"/>let activeSubjectFilter = "all";</text:p>
      <text:p text:style-name="Normal"/>
      <text:p text:style-name="Normal"><text:s text:c="8"/>/* --- DOM MANIPULATION &amp; ROUTING ENGINE --- */</text:p>
      <text:p text:style-name="Normal"><text:s text:c="8"/>window.addEventListener('DOMContentLoaded', () =&gt; {</text:p>
      <text:p text:style-name="Normal"><text:s text:c="12"/>// Remove preloader</text:p>
      <text:p text:style-name="Normal"><text:s text:c="12"/>setTimeout(() =&gt; {</text:p>
      <text:p text:style-name="Normal"><text:s text:c="16"/>const preloader = document.getElementById('preloader');</text:p>
      <text:p text:style-name="Normal"><text:s text:c="16"/>preloader.style.opacity = '0';</text:p>
      <text:p text:style-name="Normal"><text:s text:c="16"/>preloader.style.visibility = 'hidden';</text:p>
      <text:p text:style-name="Normal"><text:s text:c="16"/>initializeCounters();</text:p>
      <text:p text:style-name="Normal"><text:s text:c="12"/>}, 800);</text:p>
      <text:p text:style-name="Normal"/>
      <text:p text:style-name="Normal"><text:s text:c="12"/>// Initialize App Modules</text:p>
      <text:p text:style-name="Normal"><text:s text:c="12"/>renderNotes();</text:p>
      <text:p text:style-name="Normal"><text:s text:c="12"/>renderPastPapers();</text:p>
      <text:p text:style-name="Normal"><text:s text:c="12"/>renderTutorials();</text:p>
      <text:p text:style-name="Normal"><text:s text:c="12"/>initTheme();</text:p>
      <text:p text:style-name="Normal"><text:s text:c="12"/>setupFilterListeners();</text:p>
      <text:p text:style-name="Normal"><text:s text:c="12"/>setupSearchEngines();</text:p>
      <text:p text:style-name="Normal"><text:s text:c="12"/>setupAutoSlider();</text:p>
      <text:p text:style-name="Normal"><text:s text:c="8"/>});</text:p>
      <text:p text:style-name="Normal"/>
      <text:p text:style-name="Normal"><text:s text:c="8"/>// Navigation Controller</text:p>
      <text:p text:style-name="Normal"><text:s text:c="8"/>function switchSection(sectionId) {</text:p>
      <text:p text:style-name="Normal"><text:s text:c="12"/>// Close mobile menu if open</text:p>
      <text:p text:style-name="Normal"><text:s text:c="12"/>document.getElementById('navLinks').classList.remove('mobile-open');</text:p>
      <text:p text:style-name="Normal"/>
      <text:p text:style-name="Normal"><text:s text:c="12"/>document.querySelectorAll('.app-section').forEach(section =&gt; {</text:p>
      <text:p text:style-name="Normal"><text:s text:c="16"/>section.classList.remove('active-section');</text:p>
      <text:p text:style-name="Normal"><text:s text:c="12"/>});</text:p>
      <text:p text:style-name="Normal"><text:s text:c="12"/>document.querySelectorAll('.nav-item').forEach(link =&gt; {</text:p>
      <text:p text:style-name="Normal"><text:s text:c="16"/>link.classList.remove('active');</text:p>
      <text:p text:style-name="Normal"><text:s text:c="12"/>});</text:p>
      <text:p text:style-name="Normal"/>
      <text:p text:style-name="Normal"><text:s text:c="12"/>const targetSection = document.getElementById(`${sectionId}-section`);</text:p>
      <text:p text:style-name="Normal"><text:s text:c="12"/>if (targetSection) {</text:p>
      <text:p text:style-name="Normal"><text:s text:c="16"/>targetSection.classList.add('active-section');</text:p>
      <text:p text:style-name="Normal"><text:s text:c="16"/>const navBtn = document.getElementById(`nav-${sectionId}`);</text:p>
      <text:p text:style-name="Normal"><text:s text:c="16"/>if (navBtn) navBtn.classList.add('active');</text:p>
      <text:p text:style-name="Normal"><text:s text:c="16"/>window.scrollTo({ top: 0, behavior: 'smooth' });</text:p>
      <text:p text:style-name="Normal"><text:s text:c="12"/>}</text:p>
      <text:p text:style-name="Normal"><text:s text:c="8"/>}</text:p>
      <text:p text:style-name="Normal"/>
      <text:p text:style-name="Normal"><text:s text:c="8"/>// Mobile Menu Toggle</text:p>
      <text:p text:style-name="Normal"><text:s text:c="8"/>document.getElementById('menuToggle').addEventListener('click', () =&gt; {</text:p>
      <text:p text:style-name="Normal"><text:s text:c="12"/>document.getElementById('navLinks').classList.toggle('mobile-open');</text:p>
      <text:p text:style-name="Normal"><text:s text:c="8"/>});</text:p>
      <text:p text:style-name="Normal"/>
      <text:p text:style-name="Normal"><text:s text:c="8"/>/* --- THEME CONTROLLER (DARK / LIGHT PREFERENCE) --- */</text:p>
      <text:p text:style-name="Normal"><text:s text:c="8"/>const themeToggle = document.getElementById('themeToggle');</text:p>
      <text:p text:style-name="Normal"><text:s text:c="8"/>function initTheme() {</text:p>
      <text:p text:style-name="Normal"><text:s text:c="12"/>const savedTheme = localStorage.getItem('theme') || 'light';</text:p>
      <text:p text:style-name="Normal"><text:s text:c="12"/>document.documentElement.setAttribute('data-theme', savedTheme);</text:p>
      <text:p text:style-name="Normal"><text:s text:c="12"/>updateThemeIcon(savedTheme);</text:p>
      <text:p text:style-name="Normal"><text:s text:c="8"/>}</text:p>
      <text:p text:style-name="Normal"/>
      <text:p text:style-name="Normal"><text:s text:c="8"/>themeToggle.addEventListener('click', () =&gt; {</text:p>
      <text:p text:style-name="Normal"><text:s text:c="12"/>let currentTheme = document.documentElement.getAttribute('data-theme');</text:p>
      <text:p text:style-name="Normal"><text:s text:c="12"/>let newTheme = currentTheme === 'dark' ? 'light' : 'dark';</text:p>
      <text:p text:style-name="Normal"><text:s text:c="12"/>document.documentElement.setAttribute('data-theme', newTheme);</text:p>
      <text:p text:style-name="Normal"><text:s text:c="12"/>localStorage.setItem('theme', newTheme);</text:p>
      <text:p text:style-name="Normal"><text:s text:c="12"/>updateThemeIcon(newTheme);</text:p>
      <text:p text:style-name="Normal"><text:s text:c="8"/>});</text:p>
      <text:p text:style-name="Normal"/>
      <text:p text:style-name="Normal"><text:s text:c="8"/>function updateThemeIcon(theme) {</text:p>
      <text:p text:style-name="Normal"><text:s text:c="12"/>const icon = themeToggle.querySelector('i');</text:p>
      <text:p text:style-name="Normal"><text:s text:c="12"/>if (theme === 'dark') {</text:p>
      <text:p text:style-name="Normal"><text:s text:c="16"/>icon.className = 'fa-solid fa-sun';</text:p>
      <text:p text:style-name="Normal"><text:s text:c="12"/>} else {</text:p>
      <text:p text:style-name="Normal"><text:s text:c="16"/>icon.className = 'fa-solid fa-moon';</text:p>
      <text:p text:style-name="Normal"><text:s text:c="12"/>}</text:p>
      <text:p text:style-name="Normal"><text:s text:c="8"/>}</text:p>
      <text:p text:style-name="Normal"/>
      <text:p text:style-name="Normal"><text:s text:c="8"/>/* --- COMPONENT RENDER ENGINES --- */</text:p>
      <text:p text:style-name="Normal"><text:s text:c="8"/>function renderNotes() {</text:p>
      <text:p text:style-name="Normal"><text:s text:c="12"/>const grid = document.getElementById('notesGrid');</text:p>
      <text:p text:style-name="Normal"><text:s text:c="12"/>grid.innerHTML = "";</text:p>
      <text:p text:style-name="Normal"/>
      <text:p text:style-name="Normal"><text:s text:c="12"/>const searchQuery = document.getElementById('notesSearch').value.toLowerCase();</text:p>
      <text:p text:style-name="Normal"/>
      <text:p text:style-name="Normal"><text:s text:c="12"/>const filtered = mockNotes.filter(note =&gt; {</text:p>
      <text:p text:style-name="Normal"><text:s text:c="16"/>const matchesGrade = activeGradeFilter === "all" || note.grade === activeGradeFilter;</text:p>
      <text:p text:style-name="Normal"><text:s text:c="16"/>const matchesSubject = activeSubjectFilter === "all" || note.subject === activeSubjectFilter;</text:p>
      <text:p text:style-name="Normal"><text:s text:c="16"/>const matchesSearch = note.title.toLowerCase().includes(searchQuery) || note.desc.toLowerCase().includes(searchQuery);</text:p>
      <text:p text:style-name="Normal"><text:s text:c="16"/>return matchesGrade &amp;&amp; matchesSubject &amp;&amp; matchesSearch;</text:p>
      <text:p text:style-name="Normal"><text:s text:c="12"/>});</text:p>
      <text:p text:style-name="Normal"/>
      <text:p text:style-name="Normal"><text:s text:c="12"/>if (filtered.length === 0) {</text:p>
      <text:p text:style-name="Normal"><text:s text:c="16"/>grid.innerHTML = `&lt;p style="grid-column: 1/-1; text-align:center; color: var(--text-muted);"&gt;No notes match the selected structural parameters.&lt;/p&gt;`;</text:p>
      <text:p text:style-name="Normal"><text:s text:c="16"/>return;</text:p>
      <text:p text:style-name="Normal"><text:s text:c="12"/>}</text:p>
      <text:p text:style-name="Normal"/>
      <text:p text:style-name="Normal"><text:s text:c="12"/>filtered.forEach(note =&gt; {</text:p>
      <text:p text:style-name="Normal"><text:s text:c="16"/>const card = document.createElement('div');</text:p>
      <text:p text:style-name="Normal"><text:s text:c="16"/>card.className = 'card res-card';</text:p>
      <text:p text:style-name="Normal"><text:s text:c="16"/>card.innerHTML = `</text:p>
      <text:p text:style-name="Normal"><text:s text:c="20"/>&lt;div class="res-card-meta"&gt;</text:p>
      <text:p text:style-name="Normal"><text:s text:c="24"/>&lt;span class="badge-grade"&gt;${note.grade}&lt;/span&gt;</text:p>
      <text:p text:style-name="Normal"><text:s text:c="24"/>&lt;span class="badge-subject"&gt;${note.subject}&lt;/span&gt;</text:p>
      <text:p text:style-name="Normal"><text:s text:c="20"/>&lt;/div&gt;</text:p>
      <text:p text:style-name="Normal"><text:s text:c="20"/>&lt;h3&gt;${note.title}&lt;/h3&gt;</text:p>
      <text:p text:style-name="Normal"><text:s text:c="20"/>&lt;p&gt;${note.desc}&lt;/p&gt;</text:p>
      <text:p text:style-name="Normal"><text:s text:c="20"/>&lt;div class="res-card-footer"&gt;</text:p>
      <text:p text:style-name="Normal"><text:s text:c="24"/>&lt;span class="download-count"&gt;&lt;i class="fa-solid fa-eye"&gt;&lt;/i&gt; ${note.downloads} reads&lt;/span&gt;</text:p>
      <text:p text:style-name="Normal"><text:s text:c="24"/>&lt;button class="btn btn-primary" style="padding: 6px 12px; font-size: 13px;" onclick="trackDownload(${note.id}, this)"&gt;</text:p>
      <text:p text:style-name="Normal"><text:s text:c="28"/>&lt;i class="fa-solid fa-cloud-arrow-down"&gt;&lt;/i&gt; PDF</text:p>
      <text:p text:style-name="Normal"><text:s text:c="24"/>&lt;/button&gt;</text:p>
      <text:p text:style-name="Normal"><text:s text:c="20"/>&lt;/div&gt;</text:p>
      <text:p text:style-name="Normal"><text:s text:c="16"/>`;</text:p>
      <text:p text:style-name="Normal"><text:s text:c="16"/>grid.appendChild(card);</text:p>
      <text:p text:style-name="Normal"><text:s text:c="12"/>});</text:p>
      <text:p text:style-name="Normal"><text:s text:c="8"/>}</text:p>
      <text:p text:style-name="Normal"/>
      <text:p text:style-name="Normal"><text:s text:c="8"/>function renderPastPapers() {</text:p>
      <text:p text:style-name="Normal"><text:s text:c="12"/>const grid = document.getElementById('papersGrid');</text:p>
      <text:p text:style-name="Normal"><text:s text:c="12"/>grid.innerHTML = "";</text:p>
      <text:p text:style-name="Normal"><text:s text:c="12"/>const query = document.getElementById('papersSearch').value.toLowerCase();</text:p>
      <text:p text:style-name="Normal"/>
      <text:p text:style-name="Normal"><text:s text:c="12"/>const filtered = mockPapers.filter(paper =&gt; paper.title.toLowerCase().includes(query));</text:p>
      <text:p text:style-name="Normal"/>
      <text:p text:style-name="Normal"><text:s text:c="12"/>filtered.forEach(paper =&gt; {</text:p>
      <text:p text:style-name="Normal"><text:s text:c="16"/>const card = document.createElement('div');</text:p>
      <text:p text:style-name="Normal"><text:s text:c="16"/>card.className = 'card res-card';</text:p>
      <text:p text:style-name="Normal"><text:s text:c="16"/>card.innerHTML = `</text:p>
      <text:p text:style-name="Normal"><text:s text:c="20"/>&lt;div class="res-card-meta"&gt;</text:p>
      <text:p text:style-name="Normal"><text:s text:c="24"/>&lt;span class="badge-grade"&gt;${paper.type}&lt;/span&gt;</text:p>
      <text:p text:style-name="Normal"><text:s text:c="24"/>&lt;span class="badge-subject" style="background:rgba(245,158,11,0.1); color:#f59e0b;"&gt;${paper.year}&lt;/span&gt;</text:p>
      <text:p text:style-name="Normal"><text:s text:c="20"/>&lt;/div&gt;</text:p>
      <text:p text:style-name="Normal"><text:s text:c="20"/>&lt;h3&gt;${paper.title}&lt;/h3&gt;</text:p>
      <text:p text:style-name="Normal"><text:s text:c="20"/>&lt;p&gt;Official Evaluation resource module setup for immediate verification.&lt;/p&gt;</text:p>
      <text:p text:style-name="Normal"><text:s text:c="20"/>&lt;div class="res-card-footer"&gt;</text:p>
      <text:p text:style-name="Normal"><text:s text:c="24"/>&lt;span class="download-count"&gt;&lt;i class="fa-solid fa-download"&gt;&lt;/i&gt; &lt;span class="d-count"&gt;${paper.downloads}&lt;/span&gt;&lt;/span&gt;</text:p>
      <text:p text:style-name="Normal"><text:s text:c="24"/>&lt;button class="btn btn-primary" style="padding: 6px 12px; font-size: 13px;" onclick="trackDownload(${paper.id}, this)"&gt;</text:p>
      <text:p text:style-name="Normal"><text:s text:c="28"/>&lt;i class="fa-solid fa-file-pdf"&gt;&lt;/i&gt; Download PDF</text:p>
      <text:p text:style-name="Normal"><text:s text:c="24"/>&lt;/button&gt;</text:p>
      <text:p text:style-name="Normal"><text:s text:c="20"/>&lt;/div&gt;</text:p>
      <text:p text:style-name="Normal"><text:s text:c="16"/>`;</text:p>
      <text:p text:style-name="Normal"><text:s text:c="16"/>grid.appendChild(card);</text:p>
      <text:p text:style-name="Normal"><text:s text:c="12"/>});</text:p>
      <text:p text:style-name="Normal"><text:s text:c="8"/>}</text:p>
      <text:p text:style-name="Normal"/>
      <text:p text:style-name="Normal"><text:s text:c="8"/>function renderTutorials() {</text:p>
      <text:p text:style-name="Normal"><text:s text:c="12"/>const grid = document.getElementById('tutorialsGrid');</text:p>
      <text:p text:style-name="Normal"><text:s text:c="12"/>grid.innerHTML = "";</text:p>
      <text:p text:style-name="Normal"><text:s text:c="12"/>mockTutorials.forEach(tut =&gt; {</text:p>
      <text:p text:style-name="Normal"><text:s text:c="16"/>const card = document.createElement('div');</text:p>
      <text:p text:style-name="Normal"><text:s text:c="16"/>card.className = 'card';</text:p>
      <text:p text:style-name="Normal"><text:s text:c="16"/>card.innerHTML = `</text:p>
      <text:p text:style-name="Normal"><text:s text:c="20"/>&lt;div class="res-card-meta"&gt;</text:p>
      <text:p text:style-name="Normal"><text:s text:c="24"/>&lt;span class="badge-grade" style="background:rgba(16,185,129,0.1); color:#10b981;"&gt;${tut.category}&lt;/span&gt;</text:p>
      <text:p text:style-name="Normal"><text:s text:c="24"/>&lt;span class="download-count"&gt;${tut.readTime} read&lt;/span&gt;</text:p>
      <text:p text:style-name="Normal"><text:s text:c="20"/>&lt;/div&gt;</text:p>
      <text:p text:style-name="Normal"><text:s text:c="20"/>&lt;h3 style="margin-bottom:10px;"&gt;${tut.title}&lt;/h3&gt;</text:p>
      <text:p text:style-name="Normal"><text:s text:c="20"/>&lt;p style="font-size:14px; color:var(--text-muted); margin-bottom:15px;"&gt;${tut.desc}&lt;/p&gt;</text:p>
      <text:p text:style-name="Normal"><text:s text:c="20"/>&lt;a style="color:var(--primary); font-weight:600; cursor:pointer; font-size:14px;"&gt;Read Full Article &amp;rarr;&lt;/a&gt;</text:p>
      <text:p text:style-name="Normal"><text:s text:c="16"/>`;</text:p>
      <text:p text:style-name="Normal"><text:s text:c="16"/>grid.appendChild(card);</text:p>
      <text:p text:style-name="Normal"><text:s text:c="12"/>});</text:p>
      <text:p text:style-name="Normal"><text:s text:c="8"/>}</text:p>
      <text:p text:style-name="Normal"/>
      <text:p text:style-name="Normal"><text:s text:c="8"/>/* --- FILTERS &amp; SEARCH EVENT LISTENERS --- */</text:p>
      <text:p text:style-name="Normal"><text:s text:c="8"/>function setupFilterListeners() {</text:p>
      <text:p text:style-name="Normal"><text:s text:c="12"/>document.querySelectorAll('.filter-btn').forEach(btn =&gt; {</text:p>
      <text:p text:style-name="Normal"><text:s text:c="16"/>btn.addEventListener('click', (e) =&gt; {</text:p>
      <text:p text:style-name="Normal"><text:s text:c="20"/>const group = e.target.getAttribute('data-filter');</text:p>
      <text:p text:style-name="Normal"><text:s text:c="20"/>const val = e.target.getAttribute('data-value');</text:p>
      <text:p text:style-name="Normal"/>
      <text:p text:style-name="Normal"><text:s text:c="20"/>// Reset active states inside this criteria block</text:p>
      <text:p text:style-name="Normal"><text:s text:c="20"/>document.querySelectorAll(`.filter-btn[data-filter="${group}"]`).forEach(b =&gt; b.classList.remove('active'));</text:p>
      <text:p text:style-name="Normal"><text:s text:c="20"/>e.target.classList.add('active');</text:p>
      <text:p text:style-name="Normal"/>
      <text:p text:style-name="Normal"><text:s text:c="20"/>if(group === 'grade') activeGradeFilter = val;</text:p>
      <text:p text:style-name="Normal"><text:s text:c="20"/>if(group === 'subject') activeSubjectFilter = val;</text:p>
      <text:p text:style-name="Normal"/>
      <text:p text:style-name="Normal"><text:s text:c="20"/>renderNotes();</text:p>
      <text:p text:style-name="Normal"><text:s text:c="16"/>});</text:p>
      <text:p text:style-name="Normal"><text:s text:c="12"/>});</text:p>
      <text:p text:style-name="Normal"><text:s text:c="8"/>}</text:p>
      <text:p text:style-name="Normal"/>
      <text:p text:style-name="Normal"><text:s text:c="8"/>function setupSearchEngines() {</text:p>
      <text:p text:style-name="Normal"><text:s text:c="12"/>document.getElementById('notesSearch').addEventListener('input', renderNotes);</text:p>
      <text:p text:style-name="Normal"><text:s text:c="12"/>document.getElementById('papersSearch').addEventListener('input', renderPastPapers);</text:p>
      <text:p text:style-name="Normal"><text:s text:c="8"/>}</text:p>
      <text:p text:style-name="Normal"/>
      <text:p text:style-name="Normal"><text:s text:c="8"/>function openSubject(subjectName) {</text:p>
      <text:p text:style-name="Normal"><text:s text:c="12"/>switchSection('notes');</text:p>
      <text:p text:style-name="Normal"><text:s text:c="12"/>const subBtn = document.querySelector(`.filter-btn[data-filter="subject"][data-value="${subjectName}"]`);</text:p>
      <text:p text:style-name="Normal"><text:s text:c="12"/>if(subBtn) subBtn.click();</text:p>
      <text:p text:style-name="Normal"><text:s text:c="8"/>}</text:p>
      <text:p text:style-name="Normal"/>
      <text:p text:style-name="Normal"><text:s text:c="8"/>/* --- INTERACTIVE TRACKERS &amp; EXTRA TRICKS --- */</text:p>
      <text:p text:style-name="Normal"><text:s text:c="8"/>function trackDownload(id, element) {</text:p>
      <text:p text:style-name="Normal"><text:s text:c="12"/>element.innerHTML = `&lt;i class="fa-solid fa-spinner fa-spin"&gt;&lt;/i&gt; Fetching...`;</text:p>
      <text:p text:style-name="Normal"><text:s text:c="12"/>setTimeout(() =&gt; {</text:p>
      <text:p text:style-name="Normal"><text:s text:c="16"/>element.innerHTML = `&lt;i class="fa-solid fa-circle-check"&gt;&lt;/i&gt; Ready`;</text:p>
      <text:p text:style-name="Normal"><text:s text:c="16"/>element.style.background = "#10b981";</text:p>
      <text:p text:style-name="Normal"><text:s text:c="16"/>alert("Your highly optimized resource PDF packet package is compiling for instant download transfer pipeline!");</text:p>
      <text:p text:style-name="Normal"><text:s text:c="12"/>}, 1000);</text:p>
      <text:p text:style-name="Normal"><text:s text:c="8"/>}</text:p>
      <text:p text:style-name="Normal"/>
      <text:p text:style-name="Normal"><text:s text:c="8"/>// Live Counter Animations</text:p>
      <text:p text:style-name="Normal"><text:s text:c="8"/>function initializeCounters() {</text:p>
      <text:p text:style-name="Normal"><text:s text:c="12"/>const counters = document.querySelectorAll('.counter');</text:p>
      <text:p text:style-name="Normal"><text:s text:c="12"/>counters.forEach(counter =&gt; {</text:p>
      <text:p text:style-name="Normal"><text:s text:c="16"/>const updateCount = () =&gt; {</text:p>
      <text:p text:style-name="Normal"><text:s text:c="20"/>const target = +counter.getAttribute('data-target');</text:p>
      <text:p text:style-name="Normal"><text:s text:c="20"/>const count = +counter.innerText;</text:p>
      <text:p text:style-name="Normal"><text:s text:c="20"/>const speed = target / 80;</text:p>
      <text:p text:style-name="Normal"/>
      <text:p text:style-name="Normal"><text:s text:c="20"/>if (count &lt; target) {</text:p>
      <text:p text:style-name="Normal"><text:s text:c="24"/>counter.innerText = Math.ceil(count + speed);</text:p>
      <text:p text:style-name="Normal"><text:s text:c="24"/>setTimeout(updateCount, 20);</text:p>
      <text:p text:style-name="Normal"><text:s text:c="20"/>} else {</text:p>
      <text:p text:style-name="Normal"><text:s text:c="24"/>counter.innerText = target.toLocaleString() + "+";</text:p>
      <text:p text:style-name="Normal"><text:s text:c="20"/>}</text:p>
      <text:p text:style-name="Normal"><text:s text:c="16"/>};</text:p>
      <text:p text:style-name="Normal"><text:s text:c="16"/>updateCount();</text:p>
      <text:p text:style-name="Normal"><text:s text:c="12"/>});</text:p>
      <text:p text:style-name="Normal"><text:s text:c="8"/>}</text:p>
      <text:p text:style-name="Normal"/>
      <text:p text:style-name="Normal"><text:s text:c="8"/>// Study Tips Slide Switcher</text:p>
      <text:p text:style-name="Normal"><text:s text:c="8"/>function setupAutoSlider() {</text:p>
      <text:p text:style-name="Normal"><text:s text:c="12"/>let currentSlide = 0;</text:p>
      <text:p text:style-name="Normal"><text:s text:c="12"/>const slides = document.querySelectorAll('.slide');</text:p>
      <text:p text:style-name="Normal"><text:s text:c="12"/>setInterval(() =&gt; {</text:p>
      <text:p text:style-name="Normal"><text:s text:c="16"/>slides[currentSlide].classList.remove('active-slide');</text:p>
      <text:p text:style-name="Normal"><text:s text:c="16"/>currentSlide = (currentSlide + 1) % slides.length;</text:p>
      <text:p text:style-name="Normal"><text:s text:c="16"/>slides[currentSlide].classList.add('active-slide');</text:p>
      <text:p text:style-name="Normal"><text:s text:c="12"/>}, 6000);</text:p>
      <text:p text:style-name="Normal"><text:s text:c="8"/>}</text:p>
      <text:p text:style-name="Normal"/>
      <text:p text:style-name="Normal"><text:s text:c="8"/>// FAQ Collapse Accordion</text:p>
      <text:p text:style-name="Normal"><text:s text:c="8"/>document.querySelectorAll('.faq-header').forEach(header =&gt; {</text:p>
      <text:p text:style-name="Normal"><text:s text:c="12"/>header.addEventListener('click', () =&gt; {</text:p>
      <text:p text:style-name="Normal"><text:s text:c="16"/>const parent = header.parentElement;</text:p>
      <text:p text:style-name="Normal"><text:s text:c="16"/>parent.classList.toggle('open');</text:p>
      <text:p text:style-name="Normal"><text:s text:c="12"/>});</text:p>
      <text:p text:style-name="Normal"><text:s text:c="8"/>});</text:p>
      <text:p text:style-name="Normal"/>
      <text:p text:style-name="Normal"><text:s text:c="8"/>// Scroll to top mechanics</text:p>
      <text:p text:style-name="Normal"><text:s text:c="8"/>const scrollBtn = document.getElementById('scrollTopBtn');</text:p>
      <text:p text:style-name="Normal"><text:s text:c="8"/>window.addEventListener('scroll', () =&gt; {</text:p>
      <text:p text:style-name="Normal"><text:s text:c="12"/>if (window.scrollY &gt; 400) {</text:p>
      <text:p text:style-name="Normal"><text:s text:c="16"/>scrollBtn.classList.add('visible');</text:p>
      <text:p text:style-name="Normal"><text:s text:c="12"/>} else {</text:p>
      <text:p text:style-name="Normal"><text:s text:c="16"/>scrollBtn.classList.remove('visible');</text:p>
      <text:p text:style-name="Normal"><text:s text:c="12"/>}</text:p>
      <text:p text:style-name="Normal"><text:s text:c="8"/>});</text:p>
      <text:p text:style-name="Normal"><text:s text:c="8"/>scrollBtn.addEventListener('click', () =&gt; {</text:p>
      <text:p text:style-name="Normal"><text:s text:c="12"/>window.scrollTo({ top: 0, behavior: 'smooth' });</text:p>
      <text:p text:style-name="Normal"><text:s text:c="8"/>});</text:p>
      <text:p text:style-name="Normal"/>
      <text:p text:style-name="Normal"><text:s text:c="8"/>// Form Submission Alerts</text:p>
      <text:p text:style-name="Normal"><text:s text:c="8"/>document.getElementById('contactForm').addEventListener('submit', (e) =&gt; {</text:p>
      <text:p text:style-name="Normal"><text:s text:c="12"/>e.preventDefault();</text:p>
      <text:p text:style-name="Normal"><text:s text:c="12"/>alert("Thank you! Your notification query payload successfully transferred to Sinhala Notes moderators.");</text:p>
      <text:p text:style-name="Normal"><text:s text:c="12"/>e.target.reset();</text:p>
      <text:p text:style-name="Normal"><text:s text:c="8"/>});</text:p>
      <text:p text:style-name="Normal"/>
      <text:p text:style-name="Normal"><text:s text:c="8"/>document.getElementById('newsletterForm').addEventListener('submit', (e) =&gt; {</text:p>
      <text:p text:style-name="Normal"><text:s text:c="12"/>e.preventDefault();</text:p>
      <text:p text:style-name="Normal"><text:s text:c="12"/>alert("Securely synchronized! Enjoy early resource release notes direct to your inbox.");</text:p>
      <text:p text:style-name="Normal"><text:s text:c="12"/>e.target.reset();</text:p>
      <text:p text:style-name="Normal"><text:s text:c="8"/>});</text:p>
      <text:p text:style-name="Normal"><text:s text:c="4"/>&lt;/script&gt;</text:p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Iskoola Pota" svg:font-family="Iskoola Pota" style:font-family-generic="swiss" style:font-pitch="variable" svg:panose-1="2 11 5 2 4 2 4 2 2 3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Iskoola Pot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si" style:country-complex="LK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Iskoola Pota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Iskoola Pota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Iskoola Pota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Iskoola Pota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Iskoola Pota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Iskoola Pota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Iskoola Pota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Iskoola Pota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Iskoola Pota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Iskoola Pota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Iskoola Pota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Iskoola Pota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Iskoola Pota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Iskoola Pota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Iskoola Pota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Iskoola Pota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Iskoola Pota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Iskoola Pota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Iskoola Pota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Iskoola Pota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Iskoola Pota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Iskoola Pota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ometh Fernando</meta:initial-creator>
    <dc:creator>Bometh Fernando</dc:creator>
    <meta:creation-date>2026-07-18T18:51:00Z</meta:creation-date>
    <dc:date>2026-07-18T18:51:00Z</dc:date>
    <meta:template xlink:href="Normal.dotm" xlink:type="simple"/>
    <meta:editing-cycles>2</meta:editing-cycles>
    <meta:editing-duration>PT60S</meta:editing-duration>
    <meta:document-statistic meta:page-count="1" meta:paragraph-count="91" meta:word-count="6806" meta:character-count="45511" meta:row-count="323" meta:non-whitespace-character-count="38796"/>
  </office:meta>
</office:document-meta>
</file>